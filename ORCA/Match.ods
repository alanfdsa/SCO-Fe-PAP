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12.7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6"/>
        <table:table-row table:style-name="ro1">
          <table:table-cell/>
          <table:table-cell office:value-type="string" calcext:value-type="string">
            <text:p>HS</text:p>
          </table:table-cell>
          <table:table-cell/>
          <table:table-cell office:value-type="string" calcext:value-type="string">
            <text:p>LS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14.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6.8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4.6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27.7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38.3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42.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49.8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44.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50.7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56.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59.3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57.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63.2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67.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72.6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1.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78.6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8.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86.36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9.7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03.8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26.6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1.8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43.4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25.7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55.2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32.0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45.5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44.4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85.6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50.0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0/22</text:p>
          </table:table-cell>
          <table:table-cell office:value-type="string" calcext:value-type="string">
            <text:p>155.21/191.17</text:p>
          </table:table-cell>
          <table:table-cell table:number-columns-repeated="2"/>
          <table:table-cell table:style-name="ce2" office:value-type="string" calcext:value-type="string">
            <text:p>O match do HS22 com LS20 é melhor. Mas ao mesmo tempo o match do 19 com o 20 também faz sentido. <text:s/>No entando o produto interno do HS22 com o LS20 é maior.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158.6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217.8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70.8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7.9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80.1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54.8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204.7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7.95</text:p>
          </table:table-cell>
          <table:table-cell table:number-columns-repeated="2"/>
          <table:table-cell table:style-name="ce2" office:value-type="string" calcext:value-type="string">
            <text:p>O match do HS26 com LS23 é melhor. Mas ao mesmo tempo o match do 24 com o 23 também faz sentido. <text:s/>No entando o produto interno do HS25 com o LS23 é maior.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241.3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1" table:number-columns-repeated="16376"/>
        </table:table-row>
        <table:table-row table:style-name="ro1">
          <table:table-cell office:value-type="string" calcext:value-type="string">
            <text:p>248.5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265.9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263.0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91.6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267.5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71.6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267.9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286.3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272.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294.5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342.0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294.9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313.78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313.7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332.4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364.6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363.5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334.9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384.3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401.7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387.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442.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424.7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434.9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432.4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476.5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469.9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513.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472.2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516.0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495.1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546.3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503.7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539.4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518.1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537.88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520.4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533.9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520.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537.88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645.1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654.9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658.9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672.9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693.1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700.4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694.9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699.8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59.0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757.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59.3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758.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66.1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769.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68.0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772.9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88.9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786.4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89.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785.6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99.8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793.4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00.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795.3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37.9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846.18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39.7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848.4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56.0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857.0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56.4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856.8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67.2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860.9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67.5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861.56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904.8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884.7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905.1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884.3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930.4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930.9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930.4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930.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984.2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988.6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987.2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991.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994.14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985.2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994.6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985.9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00.5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997.8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00.5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997.8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16.0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1006.9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16.0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1006.9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28.8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1043.6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31.87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1046.78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83.0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1082.3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83.2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1083.0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10.1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1109.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12.1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1111.2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36.1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1138.7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36.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1139.36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48.82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1149.9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49.4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1150.1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76.1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1177.0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4"/>
          <table:table-cell table:style-name="ce1" table:number-columns-repeated="16376"/>
        </table:table-row>
        <table:table-row table:style-name="ro1" table:number-rows-repeated="1048469">
          <table:table-cell table:number-columns-repeated="8"/>
          <table:table-cell table:style-name="ce1" table:number-columns-repeated="16376"/>
        </table:table-row>
        <table:table-row table:style-name="ro1">
          <table:table-cell table:number-columns-repeated="8"/>
          <table:table-cell table:style-name="ce1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 style:data-style-name="N2" text:time-value="14:26:48.441473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20:00:46.631981100</meta:creation-date>
    <dc:date>2025-12-05T15:42:03.671442200</dc:date>
    <meta:editing-duration>PT18M9S</meta:editing-duration>
    <meta:editing-cycles>3</meta:editing-cycles>
    <meta:generator>LibreOffice/25.2.7.2$Windows_X86_64 LibreOffice_project/5cbfd1ab6520636bb5f7b99185aa69bd7456825d</meta:generator>
    <meta:document-statistic meta:table-count="1" meta:cell-count="379" meta:object-count="0"/>
  </office:meta>
</office:document-meta>
</file>