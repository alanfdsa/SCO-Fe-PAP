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5.0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6"/>
        <table:table-row table:style-name="ro1">
          <table:table-cell/>
          <table:table-cell office:value-type="string" calcext:value-type="string">
            <text:p>HS</text:p>
          </table:table-cell>
          <table:table-cell/>
          <table:table-cell office:value-type="string" calcext:value-type="string">
            <text:p>LS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14.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6.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4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.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8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.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4.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0.7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6.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59.3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7.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63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7.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72.6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1.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78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.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6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9.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3.8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26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.8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43.4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25.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5.2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32.0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45.5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44.4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85.6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50.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1.17" calcext:value-type="float">
            <text:p>191.17</text:p>
          </table:table-cell>
          <table:table-cell table:number-columns-repeated="2"/>
          <table:table-cell table:style-name="ce2" office:value-type="string" calcext:value-type="string">
            <text:p>O match do HS22 com LS20 é melhor. Mas ao mesmo tempo o match do 19 com o 20 também faz sentido. <text:s/>No entando o produto interno do HS22 com o LS20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158.6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17.8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70.8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7.9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80.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54.8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04.7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7.95</text:p>
          </table:table-cell>
          <table:table-cell table:number-columns-repeated="2"/>
          <table:table-cell table:style-name="ce2" office:value-type="string" calcext:value-type="string">
            <text:p>O match do HS26 com LS23 é melhor. Mas ao mesmo tempo o match do 24 com o 23 também faz sentido. <text:s/>No entando o produto interno do HS25 com o LS23 é maior.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241.3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1" table:number-columns-repeated="16376"/>
        </table:table-row>
        <table:table-row table:style-name="ro1">
          <table:table-cell office:value-type="string" calcext:value-type="string">
            <text:p>248.5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6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3.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91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1.6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67.9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86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72.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294.5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342.0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294.9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13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13.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32.4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364.6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63.5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334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384.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401.7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387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442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24.7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34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32.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476.5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69.9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513.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72.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516.0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495.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46.3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03.7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539.4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18.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537.8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533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520.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537.8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45.1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654.9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58.9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672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693.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700.4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694.9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699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0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757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59.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758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6.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769.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68.0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772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8.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786.4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89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785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799.8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793.4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00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95.3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7.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846.1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39.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848.4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0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857.0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56.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856.8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860.9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867.5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61.5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4.8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884.7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05.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884.3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930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30.4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930.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 office:value-type="string" calcext:value-type="string">
            <text:p>984.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988.6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87.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991.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1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985.2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994.6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985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97.8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00.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997.8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006.9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16.0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006.97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28.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043.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31.8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046.78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0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1082.3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083.2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1083.09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0.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1109.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12.1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1111.2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1138.7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36.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139.36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8.8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149.9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49.4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150.1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176.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177.04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  <table:table-cell table:style-name="ce1" table:number-columns-repeated="1637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" table:number-columns-repeated="16376"/>
        </table:table-row>
        <table:table-row table:style-name="ro1" table:number-rows-repeated="1048469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5:18:46.09216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00:46.631981100</meta:creation-date>
    <dc:date>2026-02-18T15:20:47.870502400</dc:date>
    <meta:editing-duration>PT20M11S</meta:editing-duration>
    <meta:editing-cycles>4</meta:editing-cycles>
    <meta:generator>LibreOffice/26.2.0.3$Windows_X86_64 LibreOffice_project/620$Build-3</meta:generator>
    <meta:document-statistic meta:table-count="1" meta:cell-count="379" meta:object-count="0"/>
  </office:meta>
</office:document-meta>
</file>