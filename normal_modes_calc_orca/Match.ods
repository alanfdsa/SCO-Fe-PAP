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_Diff_Freq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HS_freq</text:p>
          </table:table-cell>
          <table:table-cell office:value-type="string" calcext:value-type="string">
            <text:p>LS_eff_freq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4.636" calcext:value-type="float">
            <text:p>14.636</text:p>
          </table:table-cell>
          <table:table-cell table:style-name="ce4" office:value-type="float" office:value="18.263" calcext:value-type="float">
            <text:p>18.263</text:p>
          </table:table-cell>
          <table:table-cell office:value-type="float" office:value="1" calcext:value-type="float">
            <text:p>1</text:p>
          </table:table-cell>
          <table:table-cell table:formula="of:=[.B2]-[.A2]" office:value-type="float" office:value="3.627" calcext:value-type="float">
            <text:p>3.627</text:p>
          </table:table-cell>
        </table:table-row>
        <table:table-row table:style-name="ro1">
          <table:table-cell office:value-type="float" office:value="17.703" calcext:value-type="float">
            <text:p>17.703</text:p>
          </table:table-cell>
          <table:table-cell office:value-type="float" office:value="32.496" calcext:value-type="float">
            <text:p>32.496</text:p>
          </table:table-cell>
          <table:table-cell office:value-type="float" office:value="2" calcext:value-type="float">
            <text:p>2</text:p>
          </table:table-cell>
          <table:table-cell table:formula="of:=[.B3]-[.A3]" office:value-type="float" office:value="14.793" calcext:value-type="float">
            <text:p>14.793</text:p>
          </table:table-cell>
        </table:table-row>
        <table:table-row table:style-name="ro1">
          <table:table-cell office:value-type="float" office:value="27.728" calcext:value-type="float">
            <text:p>27.728</text:p>
          </table:table-cell>
          <table:table-cell office:value-type="float" office:value="41.199" calcext:value-type="float">
            <text:p>41.199</text:p>
          </table:table-cell>
          <table:table-cell office:value-type="float" office:value="3" calcext:value-type="float">
            <text:p>3</text:p>
          </table:table-cell>
          <table:table-cell table:formula="of:=[.B4]-[.A4]" office:value-type="float" office:value="13.471" calcext:value-type="float">
            <text:p>13.471</text:p>
          </table:table-cell>
        </table:table-row>
        <table:table-row table:style-name="ro1">
          <table:table-cell office:value-type="float" office:value="42.281" calcext:value-type="float">
            <text:p>42.281</text:p>
          </table:table-cell>
          <table:table-cell office:value-type="float" office:value="56.209" calcext:value-type="float">
            <text:p>56.209</text:p>
          </table:table-cell>
          <table:table-cell office:value-type="float" office:value="4" calcext:value-type="float">
            <text:p>4</text:p>
          </table:table-cell>
          <table:table-cell table:formula="of:=[.B5]-[.A5]" office:value-type="float" office:value="13.928" calcext:value-type="float">
            <text:p>13.928</text:p>
          </table:table-cell>
        </table:table-row>
        <table:table-row table:style-name="ro1">
          <table:table-cell office:value-type="float" office:value="44.716" calcext:value-type="float">
            <text:p>44.716</text:p>
          </table:table-cell>
          <table:table-cell office:value-type="float" office:value="55.224" calcext:value-type="float">
            <text:p>55.224</text:p>
          </table:table-cell>
          <table:table-cell office:value-type="float" office:value="5" calcext:value-type="float">
            <text:p>5</text:p>
          </table:table-cell>
          <table:table-cell table:formula="of:=[.B6]-[.A6]" office:value-type="float" office:value="10.508" calcext:value-type="float">
            <text:p>10.508</text:p>
          </table:table-cell>
        </table:table-row>
        <table:table-row table:style-name="ro1">
          <table:table-cell office:value-type="float" office:value="56.16" calcext:value-type="float">
            <text:p>56.16</text:p>
          </table:table-cell>
          <table:table-cell office:value-type="float" office:value="61.758" calcext:value-type="float">
            <text:p>61.758</text:p>
          </table:table-cell>
          <table:table-cell office:value-type="float" office:value="6" calcext:value-type="float">
            <text:p>6</text:p>
          </table:table-cell>
          <table:table-cell table:formula="of:=[.B7]-[.A7]" office:value-type="float" office:value="5.59800000000001" calcext:value-type="float">
            <text:p>5.59800000000001</text:p>
          </table:table-cell>
        </table:table-row>
        <table:table-row table:style-name="ro1">
          <table:table-cell office:value-type="float" office:value="57.48" calcext:value-type="float">
            <text:p>57.48</text:p>
          </table:table-cell>
          <table:table-cell office:value-type="float" office:value="67.353" calcext:value-type="float">
            <text:p>67.353</text:p>
          </table:table-cell>
          <table:table-cell office:value-type="float" office:value="7" calcext:value-type="float">
            <text:p>7</text:p>
          </table:table-cell>
          <table:table-cell table:formula="of:=[.B8]-[.A8]" office:value-type="float" office:value="9.873" calcext:value-type="float">
            <text:p>9.873</text:p>
          </table:table-cell>
        </table:table-row>
        <table:table-row table:style-name="ro1">
          <table:table-cell office:value-type="float" office:value="67.31" calcext:value-type="float">
            <text:p>67.31</text:p>
          </table:table-cell>
          <table:table-cell office:value-type="float" office:value="69.893" calcext:value-type="float">
            <text:p>69.893</text:p>
          </table:table-cell>
          <table:table-cell office:value-type="float" office:value="8" calcext:value-type="float">
            <text:p>8</text:p>
          </table:table-cell>
          <table:table-cell table:formula="of:=[.B9]-[.A9]"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71.54" calcext:value-type="float">
            <text:p>71.54</text:p>
          </table:table-cell>
          <table:table-cell office:value-type="float" office:value="74.801" calcext:value-type="float">
            <text:p>74.801</text:p>
          </table:table-cell>
          <table:table-cell office:value-type="float" office:value="9" calcext:value-type="float">
            <text:p>9</text:p>
          </table:table-cell>
          <table:table-cell table:formula="of:=[.B10]-[.A10]" office:value-type="float" office:value="3.261" calcext:value-type="float">
            <text:p>3.261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86.359" calcext:value-type="float">
            <text:p>86.359</text:p>
          </table:table-cell>
          <table:table-cell office:value-type="float" office:value="10" calcext:value-type="float">
            <text:p>10</text:p>
          </table:table-cell>
          <table:table-cell table:formula="of:=[.B11]-[.A11]" office:value-type="float" office:value="7.759" calcext:value-type="float">
            <text:p>7.759</text:p>
          </table:table-cell>
        </table:table-row>
        <table:table-row table:style-name="ro1">
          <table:table-cell office:value-type="float" office:value="89.71" calcext:value-type="float">
            <text:p>89.71</text:p>
          </table:table-cell>
          <table:table-cell office:value-type="float" office:value="116.935" calcext:value-type="float">
            <text:p>116.935</text:p>
          </table:table-cell>
          <table:table-cell office:value-type="float" office:value="11" calcext:value-type="float">
            <text:p>11</text:p>
          </table:table-cell>
          <table:table-cell table:formula="of:=[.B12]-[.A12]" office:value-type="float" office:value="27.225" calcext:value-type="float">
            <text:p>27.2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1.481" calcext:value-type="float">
            <text:p>141.481</text:p>
          </table:table-cell>
          <table:table-cell office:value-type="float" office:value="12" calcext:value-type="float">
            <text:p>12</text:p>
          </table:table-cell>
          <table:table-cell table:formula="of:=[.B13]-[.A13]" office:value-type="float" office:value="40.481" calcext:value-type="float">
            <text:p>40.481</text:p>
          </table:table-cell>
        </table:table-row>
        <table:table-row table:style-name="ro1">
          <table:table-cell office:value-type="float" office:value="101.85" calcext:value-type="float">
            <text:p>101.85</text:p>
          </table:table-cell>
          <table:table-cell office:value-type="float" office:value="185.235" calcext:value-type="float">
            <text:p>185.235</text:p>
          </table:table-cell>
          <table:table-cell office:value-type="float" office:value="13" calcext:value-type="float">
            <text:p>13</text:p>
          </table:table-cell>
          <table:table-cell table:formula="of:=[.B14]-[.A14]" office:value-type="float" office:value="83.385" calcext:value-type="float">
            <text:p>83.385</text:p>
          </table:table-cell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189.038" calcext:value-type="float">
            <text:p>189.038</text:p>
          </table:table-cell>
          <table:table-cell office:value-type="float" office:value="14" calcext:value-type="float">
            <text:p>14</text:p>
          </table:table-cell>
          <table:table-cell table:formula="of:=[.B15]-[.A15]" office:value-type="float" office:value="63.338" calcext:value-type="float">
            <text:p>63.338</text:p>
          </table:table-cell>
        </table:table-row>
        <table:table-row table:style-name="ro1">
          <table:table-cell office:value-type="float" office:value="132.03" calcext:value-type="float">
            <text:p>132.03</text:p>
          </table:table-cell>
          <table:table-cell office:value-type="float" office:value="144.589" calcext:value-type="float">
            <text:p>144.589</text:p>
          </table:table-cell>
          <table:table-cell office:value-type="float" office:value="15" calcext:value-type="float">
            <text:p>15</text:p>
          </table:table-cell>
          <table:table-cell table:formula="of:=[.B16]-[.A16]" office:value-type="float" office:value="12.559" calcext:value-type="float">
            <text:p>12.559</text:p>
          </table:table-cell>
        </table:table-row>
        <table:table-row table:style-name="ro1">
          <table:table-cell office:value-type="float" office:value="144.435" calcext:value-type="float">
            <text:p>144.435</text:p>
          </table:table-cell>
          <table:table-cell office:value-type="float" office:value="233.249" calcext:value-type="float">
            <text:p>233.249</text:p>
          </table:table-cell>
          <table:table-cell office:value-type="float" office:value="16" calcext:value-type="float">
            <text:p>16</text:p>
          </table:table-cell>
          <table:table-cell table:formula="of:=[.B17]-[.A17]" office:value-type="float" office:value="88.814" calcext:value-type="float">
            <text:p>88.814</text:p>
          </table:table-cell>
        </table:table-row>
        <table:table-row table:style-name="ro1">
          <table:table-cell office:value-type="float" office:value="150.082" calcext:value-type="float">
            <text:p>150.082</text:p>
          </table:table-cell>
          <table:table-cell office:value-type="float" office:value="163.972" calcext:value-type="float">
            <text:p>163.972</text:p>
          </table:table-cell>
          <table:table-cell office:value-type="float" office:value="17" calcext:value-type="float">
            <text:p>17</text:p>
          </table:table-cell>
          <table:table-cell table:formula="of:=[.B18]-[.A18]" office:value-type="float" office:value="13.89" calcext:value-type="float">
            <text:p>13.89</text:p>
          </table:table-cell>
        </table:table-row>
        <table:table-row table:style-name="ro1">
          <table:table-cell office:value-type="float" office:value="158.609" calcext:value-type="float">
            <text:p>158.609</text:p>
          </table:table-cell>
          <table:table-cell office:value-type="float" office:value="207.087" calcext:value-type="float">
            <text:p>207.087</text:p>
          </table:table-cell>
          <table:table-cell office:value-type="float" office:value="18" calcext:value-type="float">
            <text:p>18</text:p>
          </table:table-cell>
          <table:table-cell table:formula="of:=[.B19]-[.A19]" office:value-type="float" office:value="48.478" calcext:value-type="float">
            <text:p>48.478</text:p>
          </table:table-cell>
        </table:table-row>
        <table:table-row table:style-name="ro1">
          <table:table-cell office:value-type="float" office:value="170.835" calcext:value-type="float">
            <text:p>170.835</text:p>
          </table:table-cell>
          <table:table-cell office:value-type="float" office:value="218.233" calcext:value-type="float">
            <text:p>218.233</text:p>
          </table:table-cell>
          <table:table-cell office:value-type="float" office:value="19" calcext:value-type="float">
            <text:p>19</text:p>
          </table:table-cell>
          <table:table-cell table:formula="of:=[.B20]-[.A20]" office:value-type="float" office:value="47.398" calcext:value-type="float">
            <text:p>47.398</text:p>
          </table:table-cell>
        </table:table-row>
        <table:table-row table:style-name="ro1">
          <table:table-cell office:value-type="float" office:value="180.126" calcext:value-type="float">
            <text:p>180.126</text:p>
          </table:table-cell>
          <table:table-cell office:value-type="float" office:value="244.778" calcext:value-type="float">
            <text:p>244.778</text:p>
          </table:table-cell>
          <table:table-cell office:value-type="float" office:value="20" calcext:value-type="float">
            <text:p>20</text:p>
          </table:table-cell>
          <table:table-cell table:formula="of:=[.B21]-[.A21]" office:value-type="float" office:value="64.652" calcext:value-type="float">
            <text:p>64.652</text:p>
          </table:table-cell>
        </table:table-row>
        <table:table-row table:style-name="ro1">
          <table:table-cell office:value-type="float" office:value="204.769" calcext:value-type="float">
            <text:p>204.769</text:p>
          </table:table-cell>
          <table:table-cell office:value-type="float" office:value="269.335" calcext:value-type="float">
            <text:p>269.335</text:p>
          </table:table-cell>
          <table:table-cell office:value-type="float" office:value="21" calcext:value-type="float">
            <text:p>21</text:p>
          </table:table-cell>
          <table:table-cell table:formula="of:=[.B22]-[.A22]" office:value-type="float" office:value="64.566" calcext:value-type="float">
            <text:p>64.566</text:p>
          </table:table-cell>
        </table:table-row>
        <table:table-row table:style-name="ro1">
          <table:table-cell office:value-type="float" office:value="241.39" calcext:value-type="float">
            <text:p>241.39</text:p>
          </table:table-cell>
          <table:table-cell office:value-type="float" office:value="280.831" calcext:value-type="float">
            <text:p>280.831</text:p>
          </table:table-cell>
          <table:table-cell office:value-type="float" office:value="22" calcext:value-type="float">
            <text:p>22</text:p>
          </table:table-cell>
          <table:table-cell table:formula="of:=[.B23]-[.A23]" office:value-type="float" office:value="39.441" calcext:value-type="float">
            <text:p>39.441</text:p>
          </table:table-cell>
        </table:table-row>
        <table:table-row table:style-name="ro1">
          <table:table-cell office:value-type="float" office:value="248.508" calcext:value-type="float">
            <text:p>248.508</text:p>
          </table:table-cell>
          <table:table-cell office:value-type="float" office:value="290.294" calcext:value-type="float">
            <text:p>290.294</text:p>
          </table:table-cell>
          <table:table-cell office:value-type="float" office:value="23" calcext:value-type="float">
            <text:p>23</text:p>
          </table:table-cell>
          <table:table-cell table:formula="of:=[.B24]-[.A24]" office:value-type="float" office:value="41.786" calcext:value-type="float">
            <text:p>41.786</text:p>
          </table:table-cell>
        </table:table-row>
        <table:table-row table:style-name="ro1">
          <table:table-cell office:value-type="float" office:value="263.01" calcext:value-type="float">
            <text:p>263.01</text:p>
          </table:table-cell>
          <table:table-cell office:value-type="float" office:value="285.421" calcext:value-type="float">
            <text:p>285.421</text:p>
          </table:table-cell>
          <table:table-cell office:value-type="float" office:value="24" calcext:value-type="float">
            <text:p>24</text:p>
          </table:table-cell>
          <table:table-cell table:formula="of:=[.B25]-[.A25]" office:value-type="float" office:value="22.411" calcext:value-type="float">
            <text:p>22.411</text:p>
          </table:table-cell>
        </table:table-row>
        <table:table-row table:style-name="ro1">
          <table:table-cell office:value-type="float" office:value="267.526" calcext:value-type="float">
            <text:p>267.526</text:p>
          </table:table-cell>
          <table:table-cell office:value-type="float" office:value="297.479" calcext:value-type="float">
            <text:p>297.479</text:p>
          </table:table-cell>
          <table:table-cell office:value-type="float" office:value="25" calcext:value-type="float">
            <text:p>25</text:p>
          </table:table-cell>
          <table:table-cell table:formula="of:=[.B26]-[.A26]" office:value-type="float" office:value="29.953" calcext:value-type="float">
            <text:p>29.953</text:p>
          </table:table-cell>
        </table:table-row>
        <table:table-row table:style-name="ro1">
          <table:table-cell office:value-type="float" office:value="267.974" calcext:value-type="float">
            <text:p>267.974</text:p>
          </table:table-cell>
          <table:table-cell office:value-type="float" office:value="293.914" calcext:value-type="float">
            <text:p>293.914</text:p>
          </table:table-cell>
          <table:table-cell office:value-type="float" office:value="26" calcext:value-type="float">
            <text:p>26</text:p>
          </table:table-cell>
          <table:table-cell table:formula="of:=[.B27]-[.A27]" office:value-type="float" office:value="25.94" calcext:value-type="float">
            <text:p>25.94</text:p>
          </table:table-cell>
        </table:table-row>
        <table:table-row table:style-name="ro1">
          <table:table-cell office:value-type="float" office:value="272.909" calcext:value-type="float">
            <text:p>272.909</text:p>
          </table:table-cell>
          <table:table-cell office:value-type="float" office:value="309.072" calcext:value-type="float">
            <text:p>309.072</text:p>
          </table:table-cell>
          <table:table-cell office:value-type="float" office:value="27" calcext:value-type="float">
            <text:p>27</text:p>
          </table:table-cell>
          <table:table-cell table:formula="of:=[.B28]-[.A28]" office:value-type="float" office:value="36.163" calcext:value-type="float">
            <text:p>36.163</text:p>
          </table:table-cell>
        </table:table-row>
        <table:table-row table:style-name="ro1">
          <table:table-cell office:value-type="float" office:value="294.575" calcext:value-type="float">
            <text:p>294.575</text:p>
          </table:table-cell>
          <table:table-cell office:value-type="float" office:value="321.466" calcext:value-type="float">
            <text:p>321.466</text:p>
          </table:table-cell>
          <table:table-cell office:value-type="float" office:value="28" calcext:value-type="float">
            <text:p>28</text:p>
          </table:table-cell>
          <table:table-cell table:formula="of:=[.B29]-[.A29]" office:value-type="float" office:value="26.891" calcext:value-type="float">
            <text:p>26.891</text:p>
          </table:table-cell>
        </table:table-row>
        <table:table-row table:style-name="ro1">
          <table:table-cell office:value-type="float" office:value="294.913" calcext:value-type="float">
            <text:p>294.913</text:p>
          </table:table-cell>
          <table:table-cell office:value-type="float" office:value="296.805" calcext:value-type="float">
            <text:p>296.805</text:p>
          </table:table-cell>
          <table:table-cell office:value-type="float" office:value="29" calcext:value-type="float">
            <text:p>29</text:p>
          </table:table-cell>
          <table:table-cell table:formula="of:=[.B30]-[.A30]"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313.739" calcext:value-type="float">
            <text:p>313.739</text:p>
          </table:table-cell>
          <table:table-cell office:value-type="float" office:value="354.452" calcext:value-type="float">
            <text:p>354.452</text:p>
          </table:table-cell>
          <table:table-cell office:value-type="float" office:value="30" calcext:value-type="float">
            <text:p>30</text:p>
          </table:table-cell>
          <table:table-cell table:formula="of:=[.B31]-[.A31]" office:value-type="float" office:value="40.713" calcext:value-type="float">
            <text:p>40.713</text:p>
          </table:table-cell>
        </table:table-row>
        <table:table-row table:style-name="ro1">
          <table:table-cell office:value-type="float" office:value="332.489" calcext:value-type="float">
            <text:p>332.489</text:p>
          </table:table-cell>
          <table:table-cell office:value-type="float" office:value="364.842" calcext:value-type="float">
            <text:p>364.842</text:p>
          </table:table-cell>
          <table:table-cell office:value-type="float" office:value="31" calcext:value-type="float">
            <text:p>31</text:p>
          </table:table-cell>
          <table:table-cell table:formula="of:=[.B32]-[.A32]" office:value-type="float" office:value="32.353" calcext:value-type="float">
            <text:p>32.353</text:p>
          </table:table-cell>
        </table:table-row>
        <table:table-row table:style-name="ro1">
          <table:table-cell office:value-type="float" office:value="363.568" calcext:value-type="float">
            <text:p>363.568</text:p>
          </table:table-cell>
          <table:table-cell office:value-type="float" office:value="392.595" calcext:value-type="float">
            <text:p>392.595</text:p>
          </table:table-cell>
          <table:table-cell office:value-type="float" office:value="32" calcext:value-type="float">
            <text:p>32</text:p>
          </table:table-cell>
          <table:table-cell table:formula="of:=[.B33]-[.A33]" office:value-type="float" office:value="29.027" calcext:value-type="float">
            <text:p>29.027</text:p>
          </table:table-cell>
        </table:table-row>
        <table:table-row table:style-name="ro1">
          <table:table-cell office:value-type="float" office:value="368.237" calcext:value-type="float">
            <text:p>368.237</text:p>
          </table:table-cell>
          <table:table-cell office:value-type="float" office:value="397.396" calcext:value-type="float">
            <text:p>397.396</text:p>
          </table:table-cell>
          <table:table-cell office:value-type="float" office:value="33" calcext:value-type="float">
            <text:p>33</text:p>
          </table:table-cell>
          <table:table-cell table:formula="of:=[.B34]-[.A34]" office:value-type="float" office:value="29.159" calcext:value-type="float">
            <text:p>29.159</text:p>
          </table:table-cell>
        </table:table-row>
        <table:table-row table:style-name="ro1">
          <table:table-cell office:value-type="float" office:value="384.34" calcext:value-type="float">
            <text:p>384.34</text:p>
          </table:table-cell>
          <table:table-cell office:value-type="float" office:value="401.747" calcext:value-type="float">
            <text:p>401.747</text:p>
          </table:table-cell>
          <table:table-cell office:value-type="float" office:value="34" calcext:value-type="float">
            <text:p>34</text:p>
          </table:table-cell>
          <table:table-cell table:formula="of:=[.B35]-[.A35]" office:value-type="float" office:value="17.407" calcext:value-type="float">
            <text:p>17.407</text:p>
          </table:table-cell>
        </table:table-row>
        <table:table-row table:style-name="ro1">
          <table:table-cell office:value-type="float" office:value="387.504" calcext:value-type="float">
            <text:p>387.504</text:p>
          </table:table-cell>
          <table:table-cell office:value-type="float" office:value="410.613" calcext:value-type="float">
            <text:p>410.613</text:p>
          </table:table-cell>
          <table:table-cell office:value-type="float" office:value="35" calcext:value-type="float">
            <text:p>35</text:p>
          </table:table-cell>
          <table:table-cell table:formula="of:=[.B36]-[.A36]" office:value-type="float" office:value="23.109" calcext:value-type="float">
            <text:p>23.109</text:p>
          </table:table-cell>
        </table:table-row>
        <table:table-row table:style-name="ro1">
          <table:table-cell office:value-type="float" office:value="424.784" calcext:value-type="float">
            <text:p>424.784</text:p>
          </table:table-cell>
          <table:table-cell office:value-type="float" office:value="433.929" calcext:value-type="float">
            <text:p>433.929</text:p>
          </table:table-cell>
          <table:table-cell office:value-type="float" office:value="36" calcext:value-type="float">
            <text:p>36</text:p>
          </table:table-cell>
          <table:table-cell table:formula="of:=[.B37]-[.A37]" office:value-type="float" office:value="9.14499999999998" calcext:value-type="float">
            <text:p>9.14499999999998</text:p>
          </table:table-cell>
        </table:table-row>
        <table:table-row table:style-name="ro1">
          <table:table-cell office:value-type="float" office:value="432.445" calcext:value-type="float">
            <text:p>432.445</text:p>
          </table:table-cell>
          <table:table-cell office:value-type="float" office:value="427.776" calcext:value-type="float">
            <text:p>427.776</text:p>
          </table:table-cell>
          <table:table-cell office:value-type="float" office:value="37" calcext:value-type="float">
            <text:p>37</text:p>
          </table:table-cell>
          <table:table-cell table:formula="of:=[.B38]-[.A38]" office:value-type="float" office:value="-4.66899999999998" calcext:value-type="float">
            <text:p>-4.66899999999998</text:p>
          </table:table-cell>
        </table:table-row>
        <table:table-row table:style-name="ro1">
          <table:table-cell office:value-type="float" office:value="469.953" calcext:value-type="float">
            <text:p>469.953</text:p>
          </table:table-cell>
          <table:table-cell office:value-type="float" office:value="471.99" calcext:value-type="float">
            <text:p>471.99</text:p>
          </table:table-cell>
          <table:table-cell office:value-type="float" office:value="38" calcext:value-type="float">
            <text:p>38</text:p>
          </table:table-cell>
          <table:table-cell table:formula="of:=[.B39]-[.A39]" office:value-type="float" office:value="2.03700000000003" calcext:value-type="float">
            <text:p>2.03700000000003</text:p>
          </table:table-cell>
        </table:table-row>
        <table:table-row table:style-name="ro1">
          <table:table-cell office:value-type="float" office:value="472.216" calcext:value-type="float">
            <text:p>472.216</text:p>
          </table:table-cell>
          <table:table-cell office:value-type="float" office:value="474.858" calcext:value-type="float">
            <text:p>474.858</text:p>
          </table:table-cell>
          <table:table-cell office:value-type="float" office:value="39" calcext:value-type="float">
            <text:p>39</text:p>
          </table:table-cell>
          <table:table-cell table:formula="of:=[.B40]-[.A40]" office:value-type="float" office:value="2.642" calcext:value-type="float">
            <text:p>2.642</text:p>
          </table:table-cell>
        </table:table-row>
        <table:table-row table:style-name="ro1">
          <table:table-cell office:value-type="float" office:value="495.166" calcext:value-type="float">
            <text:p>495.166</text:p>
          </table:table-cell>
          <table:table-cell office:value-type="float" office:value="482.798" calcext:value-type="float">
            <text:p>482.798</text:p>
          </table:table-cell>
          <table:table-cell office:value-type="float" office:value="40" calcext:value-type="float">
            <text:p>40</text:p>
          </table:table-cell>
          <table:table-cell table:formula="of:=[.B41]-[.A41]" office:value-type="float" office:value="-12.368" calcext:value-type="float">
            <text:p>-12.368</text:p>
          </table:table-cell>
        </table:table-row>
        <table:table-row table:style-name="ro1">
          <table:table-cell office:value-type="float" office:value="503.755" calcext:value-type="float">
            <text:p>503.755</text:p>
          </table:table-cell>
          <table:table-cell office:value-type="float" office:value="529.311" calcext:value-type="float">
            <text:p>529.311</text:p>
          </table:table-cell>
          <table:table-cell office:value-type="float" office:value="41" calcext:value-type="float">
            <text:p>41</text:p>
          </table:table-cell>
          <table:table-cell table:formula="of:=[.B42]-[.A42]" office:value-type="float" office:value="25.556" calcext:value-type="float">
            <text:p>25.556</text:p>
          </table:table-cell>
        </table:table-row>
        <table:table-row table:style-name="ro1">
          <table:table-cell office:value-type="float" office:value="518.148" calcext:value-type="float">
            <text:p>518.148</text:p>
          </table:table-cell>
          <table:table-cell office:value-type="float" office:value="527.087" calcext:value-type="float">
            <text:p>527.087</text:p>
          </table:table-cell>
          <table:table-cell office:value-type="float" office:value="42" calcext:value-type="float">
            <text:p>42</text:p>
          </table:table-cell>
          <table:table-cell table:formula="of:=[.B43]-[.A43]" office:value-type="float" office:value="8.93899999999997" calcext:value-type="float">
            <text:p>8.93899999999997</text:p>
          </table:table-cell>
        </table:table-row>
        <table:table-row table:style-name="ro1">
          <table:table-cell office:value-type="float" office:value="520.462" calcext:value-type="float">
            <text:p>520.462</text:p>
          </table:table-cell>
          <table:table-cell office:value-type="float" office:value="529.013" calcext:value-type="float">
            <text:p>529.013</text:p>
          </table:table-cell>
          <table:table-cell office:value-type="float" office:value="43" calcext:value-type="float">
            <text:p>43</text:p>
          </table:table-cell>
          <table:table-cell table:formula="of:=[.B44]-[.A44]" office:value-type="float" office:value="8.55100000000005" calcext:value-type="float">
            <text:p>8.55100000000005</text:p>
          </table:table-cell>
        </table:table-row>
        <table:table-row table:style-name="ro1">
          <table:table-cell office:value-type="float" office:value="520.496" calcext:value-type="float">
            <text:p>520.496</text:p>
          </table:table-cell>
          <table:table-cell office:value-type="float" office:value="532.194" calcext:value-type="float">
            <text:p>532.194</text:p>
          </table:table-cell>
          <table:table-cell office:value-type="float" office:value="44" calcext:value-type="float">
            <text:p>44</text:p>
          </table:table-cell>
          <table:table-cell table:formula="of:=[.B45]-[.A45]" office:value-type="float" office:value="11.698" calcext:value-type="float">
            <text:p>11.698</text:p>
          </table:table-cell>
        </table:table-row>
        <table:table-row table:style-name="ro1">
          <table:table-cell office:value-type="float" office:value="522.77" calcext:value-type="float">
            <text:p>522.77</text:p>
          </table:table-cell>
          <table:table-cell office:value-type="float" office:value="609.452" calcext:value-type="float">
            <text:p>609.452</text:p>
          </table:table-cell>
          <table:table-cell office:value-type="float" office:value="45" calcext:value-type="float">
            <text:p>45</text:p>
          </table:table-cell>
          <table:table-cell table:formula="of:=[.B46]-[.A46]" office:value-type="float" office:value="86.682" calcext:value-type="float">
            <text:p>86.682</text:p>
          </table:table-cell>
        </table:table-row>
        <table:table-row table:style-name="ro1">
          <table:table-cell office:value-type="float" office:value="563.75" calcext:value-type="float">
            <text:p>563.75</text:p>
          </table:table-cell>
          <table:table-cell office:value-type="float" office:value="734.915" calcext:value-type="float">
            <text:p>734.915</text:p>
          </table:table-cell>
          <table:table-cell office:value-type="float" office:value="46" calcext:value-type="float">
            <text:p>46</text:p>
          </table:table-cell>
          <table:table-cell table:formula="of:=[.B47]-[.A47]" office:value-type="float" office:value="171.165" calcext:value-type="float">
            <text:p>171.165</text:p>
          </table:table-cell>
        </table:table-row>
        <table:table-row table:style-name="ro1">
          <table:table-cell office:value-type="float" office:value="564.14" calcext:value-type="float">
            <text:p>564.14</text:p>
          </table:table-cell>
          <table:table-cell office:value-type="float" office:value="751.533" calcext:value-type="float">
            <text:p>751.533</text:p>
          </table:table-cell>
          <table:table-cell office:value-type="float" office:value="47" calcext:value-type="float">
            <text:p>47</text:p>
          </table:table-cell>
          <table:table-cell table:formula="of:=[.B48]-[.A48]" office:value-type="float" office:value="187.393" calcext:value-type="float">
            <text:p>187.393</text:p>
          </table:table-cell>
        </table:table-row>
        <table:table-row table:style-name="ro1">
          <table:table-cell office:value-type="float" office:value="567.79" calcext:value-type="float">
            <text:p>567.79</text:p>
          </table:table-cell>
          <table:table-cell office:value-type="float" office:value="744.91" calcext:value-type="float">
            <text:p>744.91</text:p>
          </table:table-cell>
          <table:table-cell office:value-type="float" office:value="48" calcext:value-type="float">
            <text:p>48</text:p>
          </table:table-cell>
          <table:table-cell table:formula="of:=[.B49]-[.A49]" office:value-type="float" office:value="177.12" calcext:value-type="float">
            <text:p>177.12</text:p>
          </table:table-cell>
        </table:table-row>
        <table:table-row table:style-name="ro1">
          <table:table-cell office:value-type="float" office:value="568.59" calcext:value-type="float">
            <text:p>568.59</text:p>
          </table:table-cell>
          <table:table-cell office:value-type="float" office:value="811.553" calcext:value-type="float">
            <text:p>811.553</text:p>
          </table:table-cell>
          <table:table-cell office:value-type="float" office:value="49" calcext:value-type="float">
            <text:p>49</text:p>
          </table:table-cell>
          <table:table-cell table:formula="of:=[.B50]-[.A50]" office:value-type="float" office:value="242.963" calcext:value-type="float">
            <text:p>242.963</text:p>
          </table:table-cell>
        </table:table-row>
        <table:table-row table:style-name="ro1">
          <table:table-cell office:value-type="float" office:value="624.56" calcext:value-type="float">
            <text:p>624.56</text:p>
          </table:table-cell>
          <table:table-cell office:value-type="float" office:value="857.782" calcext:value-type="float">
            <text:p>857.782</text:p>
          </table:table-cell>
          <table:table-cell office:value-type="float" office:value="50" calcext:value-type="float">
            <text:p>50</text:p>
          </table:table-cell>
          <table:table-cell table:formula="of:=[.B51]-[.A51]" office:value-type="float" office:value="233.222" calcext:value-type="float">
            <text:p>233.222</text:p>
          </table:table-cell>
        </table:table-row>
        <table:table-row table:style-name="ro1">
          <table:table-cell office:value-type="float" office:value="631.82" calcext:value-type="float">
            <text:p>631.82</text:p>
          </table:table-cell>
          <table:table-cell office:value-type="float" office:value="655.292" calcext:value-type="float">
            <text:p>655.292</text:p>
          </table:table-cell>
          <table:table-cell office:value-type="float" office:value="51" calcext:value-type="float">
            <text:p>51</text:p>
          </table:table-cell>
          <table:table-cell table:formula="of:=[.B52]-[.A52]" office:value-type="float" office:value="23.472" calcext:value-type="float">
            <text:p>23.472</text:p>
          </table:table-cell>
        </table:table-row>
        <table:table-row table:style-name="ro1">
          <table:table-cell office:value-type="float" office:value="645.169" calcext:value-type="float">
            <text:p>645.169</text:p>
          </table:table-cell>
          <table:table-cell office:value-type="float" office:value="806.093" calcext:value-type="float">
            <text:p>806.093</text:p>
          </table:table-cell>
          <table:table-cell office:value-type="float" office:value="52" calcext:value-type="float">
            <text:p>52</text:p>
          </table:table-cell>
          <table:table-cell table:formula="of:=[.B53]-[.A53]" office:value-type="float" office:value="160.924" calcext:value-type="float">
            <text:p>160.924</text:p>
          </table:table-cell>
        </table:table-row>
        <table:table-row table:style-name="ro1">
          <table:table-cell office:value-type="float" office:value="646.647" calcext:value-type="float">
            <text:p>646.647</text:p>
          </table:table-cell>
          <table:table-cell office:value-type="float" office:value="652.957" calcext:value-type="float">
            <text:p>652.957</text:p>
          </table:table-cell>
          <table:table-cell office:value-type="float" office:value="53" calcext:value-type="float">
            <text:p>53</text:p>
          </table:table-cell>
          <table:table-cell table:formula="of:=[.B54]-[.A54]" office:value-type="float" office:value="6.30999999999995" calcext:value-type="float">
            <text:p>6.30999999999995</text:p>
          </table:table-cell>
        </table:table-row>
        <table:table-row table:style-name="ro1">
          <table:table-cell office:value-type="float" office:value="658.928" calcext:value-type="float">
            <text:p>658.928</text:p>
          </table:table-cell>
          <table:table-cell office:value-type="float" office:value="665.952" calcext:value-type="float">
            <text:p>665.952</text:p>
          </table:table-cell>
          <table:table-cell office:value-type="float" office:value="54" calcext:value-type="float">
            <text:p>54</text:p>
          </table:table-cell>
          <table:table-cell table:formula="of:=[.B55]-[.A55]" office:value-type="float" office:value="7.024" calcext:value-type="float">
            <text:p>7.024</text:p>
          </table:table-cell>
        </table:table-row>
        <table:table-row table:style-name="ro1">
          <table:table-cell office:value-type="float" office:value="659.006" calcext:value-type="float">
            <text:p>659.006</text:p>
          </table:table-cell>
          <table:table-cell office:value-type="float" office:value="670.021" calcext:value-type="float">
            <text:p>670.021</text:p>
          </table:table-cell>
          <table:table-cell office:value-type="float" office:value="55" calcext:value-type="float">
            <text:p>55</text:p>
          </table:table-cell>
          <table:table-cell table:formula="of:=[.B56]-[.A56]" office:value-type="float" office:value="11.015" calcext:value-type="float">
            <text:p>11.015</text:p>
          </table:table-cell>
        </table:table-row>
        <table:table-row table:style-name="ro1">
          <table:table-cell office:value-type="float" office:value="693.194" calcext:value-type="float">
            <text:p>693.194</text:p>
          </table:table-cell>
          <table:table-cell office:value-type="float" office:value="696.509" calcext:value-type="float">
            <text:p>696.509</text:p>
          </table:table-cell>
          <table:table-cell office:value-type="float" office:value="56" calcext:value-type="float">
            <text:p>56</text:p>
          </table:table-cell>
          <table:table-cell table:formula="of:=[.B57]-[.A57]" office:value-type="float" office:value="3.31500000000005" calcext:value-type="float">
            <text:p>3.31500000000005</text:p>
          </table:table-cell>
        </table:table-row>
        <table:table-row table:style-name="ro1">
          <table:table-cell office:value-type="float" office:value="694.908" calcext:value-type="float">
            <text:p>694.908</text:p>
          </table:table-cell>
          <table:table-cell office:value-type="float" office:value="694.569" calcext:value-type="float">
            <text:p>694.569</text:p>
          </table:table-cell>
          <table:table-cell office:value-type="float" office:value="57" calcext:value-type="float">
            <text:p>57</text:p>
          </table:table-cell>
          <table:table-cell table:formula="of:=[.B58]-[.A58]" office:value-type="float" office:value="-0.339000000000056" calcext:value-type="float">
            <text:p>-0.339000000000056</text:p>
          </table:table-cell>
        </table:table-row>
        <table:table-row table:style-name="ro1">
          <table:table-cell office:value-type="float" office:value="759.016" calcext:value-type="float">
            <text:p>759.016</text:p>
          </table:table-cell>
          <table:table-cell office:value-type="float" office:value="760.294" calcext:value-type="float">
            <text:p>760.294</text:p>
          </table:table-cell>
          <table:table-cell office:value-type="float" office:value="58" calcext:value-type="float">
            <text:p>58</text:p>
          </table:table-cell>
          <table:table-cell table:formula="of:=[.B59]-[.A59]" office:value-type="float" office:value="1.27800000000002" calcext:value-type="float">
            <text:p>1.27800000000002</text:p>
          </table:table-cell>
        </table:table-row>
        <table:table-row table:style-name="ro1">
          <table:table-cell office:value-type="float" office:value="759.342" calcext:value-type="float">
            <text:p>759.342</text:p>
          </table:table-cell>
          <table:table-cell office:value-type="float" office:value="762.215" calcext:value-type="float">
            <text:p>762.215</text:p>
          </table:table-cell>
          <table:table-cell office:value-type="float" office:value="59" calcext:value-type="float">
            <text:p>59</text:p>
          </table:table-cell>
          <table:table-cell table:formula="of:=[.B60]-[.A60]" office:value-type="float" office:value="2.87300000000005" calcext:value-type="float">
            <text:p>2.87300000000005</text:p>
          </table:table-cell>
        </table:table-row>
        <table:table-row table:style-name="ro1">
          <table:table-cell office:value-type="float" office:value="766.172" calcext:value-type="float">
            <text:p>766.172</text:p>
          </table:table-cell>
          <table:table-cell office:value-type="float" office:value="769.203" calcext:value-type="float">
            <text:p>769.203</text:p>
          </table:table-cell>
          <table:table-cell office:value-type="float" office:value="60" calcext:value-type="float">
            <text:p>60</text:p>
          </table:table-cell>
          <table:table-cell table:formula="of:=[.B61]-[.A61]" office:value-type="float" office:value="3.03099999999995" calcext:value-type="float">
            <text:p>3.03099999999995</text:p>
          </table:table-cell>
        </table:table-row>
        <table:table-row table:style-name="ro1">
          <table:table-cell office:value-type="float" office:value="768.047" calcext:value-type="float">
            <text:p>768.047</text:p>
          </table:table-cell>
          <table:table-cell office:value-type="float" office:value="772.943" calcext:value-type="float">
            <text:p>772.943</text:p>
          </table:table-cell>
          <table:table-cell office:value-type="float" office:value="61" calcext:value-type="float">
            <text:p>61</text:p>
          </table:table-cell>
          <table:table-cell table:formula="of:=[.B62]-[.A62]" office:value-type="float" office:value="4.89599999999996" calcext:value-type="float">
            <text:p>4.89599999999996</text:p>
          </table:table-cell>
        </table:table-row>
        <table:table-row table:style-name="ro1">
          <table:table-cell office:value-type="float" office:value="788.925" calcext:value-type="float">
            <text:p>788.925</text:p>
          </table:table-cell>
          <table:table-cell office:value-type="float" office:value="781.511" calcext:value-type="float">
            <text:p>781.511</text:p>
          </table:table-cell>
          <table:table-cell office:value-type="float" office:value="62" calcext:value-type="float">
            <text:p>62</text:p>
          </table:table-cell>
          <table:table-cell table:formula="of:=[.B63]-[.A63]" office:value-type="float" office:value="-7.41399999999999" calcext:value-type="float">
            <text:p>-7.41399999999999</text:p>
          </table:table-cell>
        </table:table-row>
        <table:table-row table:style-name="ro1">
          <table:table-cell office:value-type="float" office:value="789.095" calcext:value-type="float">
            <text:p>789.095</text:p>
          </table:table-cell>
          <table:table-cell office:value-type="float" office:value="779.744" calcext:value-type="float">
            <text:p>779.744</text:p>
          </table:table-cell>
          <table:table-cell office:value-type="float" office:value="63" calcext:value-type="float">
            <text:p>63</text:p>
          </table:table-cell>
          <table:table-cell table:formula="of:=[.B64]-[.A64]" office:value-type="float" office:value="-9.351" calcext:value-type="float">
            <text:p>-9.351</text:p>
          </table:table-cell>
        </table:table-row>
        <table:table-row table:style-name="ro1">
          <table:table-cell office:value-type="float" office:value="799.86" calcext:value-type="float">
            <text:p>799.86</text:p>
          </table:table-cell>
          <table:table-cell office:value-type="float" office:value="799.252" calcext:value-type="float">
            <text:p>799.252</text:p>
          </table:table-cell>
          <table:table-cell office:value-type="float" office:value="64" calcext:value-type="float">
            <text:p>64</text:p>
          </table:table-cell>
          <table:table-cell table:formula="of:=[.B65]-[.A65]" office:value-type="float" office:value="-0.608000000000061" calcext:value-type="float">
            <text:p>-0.608000000000061</text:p>
          </table:table-cell>
        </table:table-row>
        <table:table-row table:style-name="ro1">
          <table:table-cell office:value-type="float" office:value="800.597" calcext:value-type="float">
            <text:p>800.597</text:p>
          </table:table-cell>
          <table:table-cell office:value-type="float" office:value="801.322" calcext:value-type="float">
            <text:p>801.322</text:p>
          </table:table-cell>
          <table:table-cell office:value-type="float" office:value="65" calcext:value-type="float">
            <text:p>65</text:p>
          </table:table-cell>
          <table:table-cell table:formula="of:=[.B66]-[.A66]" office:value-type="float" office:value="0.725000000000023" calcext:value-type="float">
            <text:p>0.725000000000023</text:p>
          </table:table-cell>
        </table:table-row>
        <table:table-row table:style-name="ro1">
          <table:table-cell office:value-type="float" office:value="837.923" calcext:value-type="float">
            <text:p>837.923</text:p>
          </table:table-cell>
          <table:table-cell office:value-type="float" office:value="846.893" calcext:value-type="float">
            <text:p>846.893</text:p>
          </table:table-cell>
          <table:table-cell office:value-type="float" office:value="66" calcext:value-type="float">
            <text:p>66</text:p>
          </table:table-cell>
          <table:table-cell table:formula="of:=[.B67]-[.A67]" office:value-type="float" office:value="8.97000000000003" calcext:value-type="float">
            <text:p>8.97000000000003</text:p>
          </table:table-cell>
        </table:table-row>
        <table:table-row table:style-name="ro1">
          <table:table-cell office:value-type="float" office:value="839.736" calcext:value-type="float">
            <text:p>839.736</text:p>
          </table:table-cell>
          <table:table-cell office:value-type="float" office:value="848.451" calcext:value-type="float">
            <text:p>848.451</text:p>
          </table:table-cell>
          <table:table-cell office:value-type="float" office:value="67" calcext:value-type="float">
            <text:p>67</text:p>
          </table:table-cell>
          <table:table-cell table:formula="of:=[.B68]-[.A68]" office:value-type="float" office:value="8.71500000000003" calcext:value-type="float">
            <text:p>8.71500000000003</text:p>
          </table:table-cell>
        </table:table-row>
        <table:table-row table:style-name="ro1">
          <table:table-cell office:value-type="float" office:value="856.09" calcext:value-type="float">
            <text:p>856.09</text:p>
          </table:table-cell>
          <table:table-cell office:value-type="float" office:value="857.035" calcext:value-type="float">
            <text:p>857.035</text:p>
          </table:table-cell>
          <table:table-cell office:value-type="float" office:value="68" calcext:value-type="float">
            <text:p>68</text:p>
          </table:table-cell>
          <table:table-cell table:formula="of:=[.B69]-[.A69]" office:value-type="float" office:value="0.944999999999936" calcext:value-type="float">
            <text:p>0.944999999999936</text:p>
          </table:table-cell>
        </table:table-row>
        <table:table-row table:style-name="ro1">
          <table:table-cell office:value-type="float" office:value="856.445" calcext:value-type="float">
            <text:p>856.445</text:p>
          </table:table-cell>
          <table:table-cell office:value-type="float" office:value="856.834" calcext:value-type="float">
            <text:p>856.834</text:p>
          </table:table-cell>
          <table:table-cell office:value-type="float" office:value="69" calcext:value-type="float">
            <text:p>69</text:p>
          </table:table-cell>
          <table:table-cell table:formula="of:=[.B70]-[.A70]" office:value-type="float" office:value="0.388999999999896" calcext:value-type="float">
            <text:p>0.388999999999896</text:p>
          </table:table-cell>
        </table:table-row>
        <table:table-row table:style-name="ro1">
          <table:table-cell office:value-type="float" office:value="867.241" calcext:value-type="float">
            <text:p>867.241</text:p>
          </table:table-cell>
          <table:table-cell office:value-type="float" office:value="860.909" calcext:value-type="float">
            <text:p>860.909</text:p>
          </table:table-cell>
          <table:table-cell office:value-type="float" office:value="70" calcext:value-type="float">
            <text:p>70</text:p>
          </table:table-cell>
          <table:table-cell table:formula="of:=[.B71]-[.A71]" office:value-type="float" office:value="-6.33199999999999" calcext:value-type="float">
            <text:p>-6.33199999999999</text:p>
          </table:table-cell>
        </table:table-row>
        <table:table-row table:style-name="ro1">
          <table:table-cell office:value-type="float" office:value="867.533" calcext:value-type="float">
            <text:p>867.533</text:p>
          </table:table-cell>
          <table:table-cell office:value-type="float" office:value="861.563" calcext:value-type="float">
            <text:p>861.563</text:p>
          </table:table-cell>
          <table:table-cell office:value-type="float" office:value="71" calcext:value-type="float">
            <text:p>71</text:p>
          </table:table-cell>
          <table:table-cell table:formula="of:=[.B72]-[.A72]" office:value-type="float" office:value="-5.97000000000003" calcext:value-type="float">
            <text:p>-5.97000000000003</text:p>
          </table:table-cell>
        </table:table-row>
        <table:table-row table:style-name="ro1">
          <table:table-cell office:value-type="float" office:value="904.85" calcext:value-type="float">
            <text:p>904.85</text:p>
          </table:table-cell>
          <table:table-cell office:value-type="float" office:value="893.792" calcext:value-type="float">
            <text:p>893.792</text:p>
          </table:table-cell>
          <table:table-cell office:value-type="float" office:value="72" calcext:value-type="float">
            <text:p>72</text:p>
          </table:table-cell>
          <table:table-cell table:formula="of:=[.B73]-[.A73]" office:value-type="float" office:value="-11.058" calcext:value-type="float">
            <text:p>-11.058</text:p>
          </table:table-cell>
        </table:table-row>
        <table:table-row table:style-name="ro1">
          <table:table-cell office:value-type="float" office:value="905.131" calcext:value-type="float">
            <text:p>905.131</text:p>
          </table:table-cell>
          <table:table-cell office:value-type="float" office:value="892.887" calcext:value-type="float">
            <text:p>892.887</text:p>
          </table:table-cell>
          <table:table-cell office:value-type="float" office:value="73" calcext:value-type="float">
            <text:p>73</text:p>
          </table:table-cell>
          <table:table-cell table:formula="of:=[.B74]-[.A74]" office:value-type="float" office:value="-12.244" calcext:value-type="float">
            <text:p>-12.244</text:p>
          </table:table-cell>
        </table:table-row>
        <table:table-row table:style-name="ro1">
          <table:table-cell office:value-type="float" office:value="911.981" calcext:value-type="float">
            <text:p>911.981</text:p>
          </table:table-cell>
          <table:table-cell office:value-type="float" office:value="913.728" calcext:value-type="float">
            <text:p>913.728</text:p>
          </table:table-cell>
          <table:table-cell office:value-type="float" office:value="74" calcext:value-type="float">
            <text:p>74</text:p>
          </table:table-cell>
          <table:table-cell table:formula="of:=[.B75]-[.A75]" office:value-type="float" office:value="1.74699999999996" calcext:value-type="float">
            <text:p>1.74699999999996</text:p>
          </table:table-cell>
        </table:table-row>
        <table:table-row table:style-name="ro1">
          <table:table-cell office:value-type="float" office:value="915.312" calcext:value-type="float">
            <text:p>915.312</text:p>
          </table:table-cell>
          <table:table-cell office:value-type="float" office:value="916.305" calcext:value-type="float">
            <text:p>916.305</text:p>
          </table:table-cell>
          <table:table-cell office:value-type="float" office:value="75" calcext:value-type="float">
            <text:p>75</text:p>
          </table:table-cell>
          <table:table-cell table:formula="of:=[.B76]-[.A76]" office:value-type="float" office:value="0.992999999999938" calcext:value-type="float">
            <text:p>0.992999999999938</text:p>
          </table:table-cell>
        </table:table-row>
        <table:table-row table:style-name="ro1">
          <table:table-cell office:value-type="float" office:value="930.428" calcext:value-type="float">
            <text:p>930.428</text:p>
          </table:table-cell>
          <table:table-cell office:value-type="float" office:value="930.12" calcext:value-type="float">
            <text:p>930.12</text:p>
          </table:table-cell>
          <table:table-cell office:value-type="float" office:value="76" calcext:value-type="float">
            <text:p>76</text:p>
          </table:table-cell>
          <table:table-cell table:formula="of:=[.B77]-[.A77]" office:value-type="float" office:value="-0.307999999999993" calcext:value-type="float">
            <text:p>-0.307999999999993</text:p>
          </table:table-cell>
        </table:table-row>
        <table:table-row table:style-name="ro1">
          <table:table-cell office:value-type="float" office:value="930.442" calcext:value-type="float">
            <text:p>930.442</text:p>
          </table:table-cell>
          <table:table-cell office:value-type="float" office:value="930.087" calcext:value-type="float">
            <text:p>930.087</text:p>
          </table:table-cell>
          <table:table-cell office:value-type="float" office:value="77" calcext:value-type="float">
            <text:p>77</text:p>
          </table:table-cell>
          <table:table-cell table:formula="of:=[.B78]-[.A78]" office:value-type="float" office:value="-0.355000000000018" calcext:value-type="float">
            <text:p>-0.355000000000018</text:p>
          </table:table-cell>
        </table:table-row>
        <table:table-row table:style-name="ro1">
          <table:table-cell office:value-type="float" office:value="952.015" calcext:value-type="float">
            <text:p>952.015</text:p>
          </table:table-cell>
          <table:table-cell office:value-type="float" office:value="905.874" calcext:value-type="float">
            <text:p>905.874</text:p>
          </table:table-cell>
          <table:table-cell office:value-type="float" office:value="78" calcext:value-type="float">
            <text:p>78</text:p>
          </table:table-cell>
          <table:table-cell table:formula="of:=[.B79]-[.A79]" office:value-type="float" office:value="-46.141" calcext:value-type="float">
            <text:p>-46.141</text:p>
          </table:table-cell>
        </table:table-row>
        <table:table-row table:style-name="ro1">
          <table:table-cell office:value-type="float" office:value="952.34" calcext:value-type="float">
            <text:p>952.34</text:p>
          </table:table-cell>
          <table:table-cell office:value-type="float" office:value="908.495" calcext:value-type="float">
            <text:p>908.495</text:p>
          </table:table-cell>
          <table:table-cell office:value-type="float" office:value="79" calcext:value-type="float">
            <text:p>79</text:p>
          </table:table-cell>
          <table:table-cell table:formula="of:=[.B80]-[.A80]" office:value-type="float" office:value="-43.845" calcext:value-type="float">
            <text:p>-43.845</text:p>
          </table:table-cell>
        </table:table-row>
        <table:table-row table:style-name="ro1">
          <table:table-cell office:value-type="float" office:value="984.292" calcext:value-type="float">
            <text:p>984.292</text:p>
          </table:table-cell>
          <table:table-cell office:value-type="float" office:value="988.623" calcext:value-type="float">
            <text:p>988.623</text:p>
          </table:table-cell>
          <table:table-cell office:value-type="float" office:value="80" calcext:value-type="float">
            <text:p>80</text:p>
          </table:table-cell>
          <table:table-cell table:formula="of:=[.B81]-[.A81]" office:value-type="float" office:value="4.33100000000002" calcext:value-type="float">
            <text:p>4.33100000000002</text:p>
          </table:table-cell>
        </table:table-row>
        <table:table-row table:style-name="ro1">
          <table:table-cell office:value-type="float" office:value="987.277" calcext:value-type="float">
            <text:p>987.277</text:p>
          </table:table-cell>
          <table:table-cell office:value-type="float" office:value="991.3" calcext:value-type="float">
            <text:p>991.3</text:p>
          </table:table-cell>
          <table:table-cell office:value-type="float" office:value="81" calcext:value-type="float">
            <text:p>81</text:p>
          </table:table-cell>
          <table:table-cell table:formula="of:=[.B82]-[.A82]" office:value-type="float" office:value="4.02299999999991" calcext:value-type="float">
            <text:p>4.02299999999991</text:p>
          </table:table-cell>
        </table:table-row>
        <table:table-row table:style-name="ro1">
          <table:table-cell office:value-type="float" office:value="994.144" calcext:value-type="float">
            <text:p>994.144</text:p>
          </table:table-cell>
          <table:table-cell office:value-type="float" office:value="985.275" calcext:value-type="float">
            <text:p>985.275</text:p>
          </table:table-cell>
          <table:table-cell office:value-type="float" office:value="82" calcext:value-type="float">
            <text:p>82</text:p>
          </table:table-cell>
          <table:table-cell table:formula="of:=[.B83]-[.A83]" office:value-type="float" office:value="-8.86900000000003" calcext:value-type="float">
            <text:p>-8.86900000000003</text:p>
          </table:table-cell>
        </table:table-row>
        <table:table-row table:style-name="ro1">
          <table:table-cell office:value-type="float" office:value="994.658" calcext:value-type="float">
            <text:p>994.658</text:p>
          </table:table-cell>
          <table:table-cell office:value-type="float" office:value="985.933" calcext:value-type="float">
            <text:p>985.933</text:p>
          </table:table-cell>
          <table:table-cell office:value-type="float" office:value="83" calcext:value-type="float">
            <text:p>83</text:p>
          </table:table-cell>
          <table:table-cell table:formula="of:=[.B84]-[.A84]" office:value-type="float" office:value="-8.72500000000002" calcext:value-type="float">
            <text:p>-8.72500000000002</text:p>
          </table:table-cell>
        </table:table-row>
        <table:table-row table:style-name="ro1">
          <table:table-cell office:value-type="float" office:value="1000.56" calcext:value-type="float">
            <text:p>1000.56</text:p>
          </table:table-cell>
          <table:table-cell office:value-type="float" office:value="997.877" calcext:value-type="float">
            <text:p>997.877</text:p>
          </table:table-cell>
          <table:table-cell office:value-type="float" office:value="84" calcext:value-type="float">
            <text:p>84</text:p>
          </table:table-cell>
          <table:table-cell table:formula="of:=[.B85]-[.A85]" office:value-type="float" office:value="-2.68299999999999" calcext:value-type="float">
            <text:p>-2.68299999999999</text:p>
          </table:table-cell>
        </table:table-row>
        <table:table-row table:style-name="ro1">
          <table:table-cell office:value-type="float" office:value="1000.58" calcext:value-type="float">
            <text:p>1000.58</text:p>
          </table:table-cell>
          <table:table-cell office:value-type="float" office:value="997.879" calcext:value-type="float">
            <text:p>997.879</text:p>
          </table:table-cell>
          <table:table-cell office:value-type="float" office:value="85" calcext:value-type="float">
            <text:p>85</text:p>
          </table:table-cell>
          <table:table-cell table:formula="of:=[.B86]-[.A86]" office:value-type="float" office:value="-2.70100000000002" calcext:value-type="float">
            <text:p>-2.70100000000002</text:p>
          </table:table-cell>
        </table:table-row>
        <table:table-row table:style-name="ro1">
          <table:table-cell office:value-type="float" office:value="1016.038" calcext:value-type="float">
            <text:p>1016.038</text:p>
          </table:table-cell>
          <table:table-cell office:value-type="float" office:value="1006.947" calcext:value-type="float">
            <text:p>1006.947</text:p>
          </table:table-cell>
          <table:table-cell office:value-type="float" office:value="86" calcext:value-type="float">
            <text:p>86</text:p>
          </table:table-cell>
          <table:table-cell table:formula="of:=[.B87]-[.A87]" office:value-type="float" office:value="-9.09100000000001" calcext:value-type="float">
            <text:p>-9.09100000000001</text:p>
          </table:table-cell>
        </table:table-row>
        <table:table-row table:style-name="ro1">
          <table:table-cell office:value-type="float" office:value="1016.086" calcext:value-type="float">
            <text:p>1016.086</text:p>
          </table:table-cell>
          <table:table-cell office:value-type="float" office:value="1006.948" calcext:value-type="float">
            <text:p>1006.948</text:p>
          </table:table-cell>
          <table:table-cell office:value-type="float" office:value="87" calcext:value-type="float">
            <text:p>87</text:p>
          </table:table-cell>
          <table:table-cell table:formula="of:=[.B88]-[.A88]" office:value-type="float" office:value="-9.13800000000003" calcext:value-type="float">
            <text:p>-9.13800000000003</text:p>
          </table:table-cell>
        </table:table-row>
        <table:table-row table:style-name="ro1">
          <table:table-cell office:value-type="float" office:value="1028.874" calcext:value-type="float">
            <text:p>1028.874</text:p>
          </table:table-cell>
          <table:table-cell office:value-type="float" office:value="1043.598" calcext:value-type="float">
            <text:p>1043.598</text:p>
          </table:table-cell>
          <table:table-cell office:value-type="float" office:value="88" calcext:value-type="float">
            <text:p>88</text:p>
          </table:table-cell>
          <table:table-cell table:formula="of:=[.B89]-[.A89]" office:value-type="float" office:value="14.7239999999999" calcext:value-type="float">
            <text:p>14.7239999999999</text:p>
          </table:table-cell>
        </table:table-row>
        <table:table-row table:style-name="ro1">
          <table:table-cell office:value-type="float" office:value="1031.868" calcext:value-type="float">
            <text:p>1031.868</text:p>
          </table:table-cell>
          <table:table-cell office:value-type="float" office:value="1046.776" calcext:value-type="float">
            <text:p>1046.776</text:p>
          </table:table-cell>
          <table:table-cell office:value-type="float" office:value="89" calcext:value-type="float">
            <text:p>89</text:p>
          </table:table-cell>
          <table:table-cell table:formula="of:=[.B90]-[.A90]" office:value-type="float" office:value="14.9080000000001" calcext:value-type="float">
            <text:p>14.9080000000001</text:p>
          </table:table-cell>
        </table:table-row>
        <table:table-row table:style-name="ro1">
          <table:table-cell office:value-type="string" calcext:value-type="string">
            <text:p>1083.04</text:p>
          </table:table-cell>
          <table:table-cell office:value-type="float" office:value="1082.351" calcext:value-type="float">
            <text:p>1082.351</text:p>
          </table:table-cell>
          <table:table-cell office:value-type="float" office:value="90" calcext:value-type="float">
            <text:p>90</text:p>
          </table:table-cell>
          <table:table-cell table:formula="of:=[.B91]-[.A91]" office:value-type="float" office:value="-0.688999999999851" calcext:value-type="float">
            <text:p>-0.688999999999851</text:p>
          </table:table-cell>
        </table:table-row>
        <table:table-row table:style-name="ro1">
          <table:table-cell office:value-type="float" office:value="1083.268" calcext:value-type="float">
            <text:p>1083.268</text:p>
          </table:table-cell>
          <table:table-cell office:value-type="float" office:value="1083.089" calcext:value-type="float">
            <text:p>1083.089</text:p>
          </table:table-cell>
          <table:table-cell office:value-type="float" office:value="91" calcext:value-type="float">
            <text:p>91</text:p>
          </table:table-cell>
          <table:table-cell table:formula="of:=[.B92]-[.A92]" office:value-type="float" office:value="-0.179000000000087" calcext:value-type="float">
            <text:p>-0.179000000000087</text:p>
          </table:table-cell>
        </table:table-row>
        <table:table-row table:style-name="ro1">
          <table:table-cell office:value-type="float" office:value="1110.155" calcext:value-type="float">
            <text:p>1110.155</text:p>
          </table:table-cell>
          <table:table-cell office:value-type="float" office:value="1109.399" calcext:value-type="float">
            <text:p>1109.399</text:p>
          </table:table-cell>
          <table:table-cell office:value-type="float" office:value="92" calcext:value-type="float">
            <text:p>92</text:p>
          </table:table-cell>
          <table:table-cell table:formula="of:=[.B93]-[.A93]" office:value-type="float" office:value="-0.756000000000086" calcext:value-type="float">
            <text:p>-0.756000000000086</text:p>
          </table:table-cell>
        </table:table-row>
        <table:table-row table:style-name="ro1">
          <table:table-cell office:value-type="float" office:value="1112.127" calcext:value-type="float">
            <text:p>1112.127</text:p>
          </table:table-cell>
          <table:table-cell office:value-type="float" office:value="1111.247" calcext:value-type="float">
            <text:p>1111.247</text:p>
          </table:table-cell>
          <table:table-cell office:value-type="float" office:value="93" calcext:value-type="float">
            <text:p>93</text:p>
          </table:table-cell>
          <table:table-cell table:formula="of:=[.B94]-[.A94]" office:value-type="float" office:value="-0.879999999999882" calcext:value-type="float">
            <text:p>-0.879999999999882</text:p>
          </table:table-cell>
        </table:table-row>
        <table:table-row table:style-name="ro1">
          <table:table-cell office:value-type="float" office:value="1136.123" calcext:value-type="float">
            <text:p>1136.123</text:p>
          </table:table-cell>
          <table:table-cell office:value-type="float" office:value="1138.732" calcext:value-type="float">
            <text:p>1138.732</text:p>
          </table:table-cell>
          <table:table-cell office:value-type="float" office:value="94" calcext:value-type="float">
            <text:p>94</text:p>
          </table:table-cell>
          <table:table-cell table:formula="of:=[.B95]-[.A95]" office:value-type="float" office:value="2.60899999999992" calcext:value-type="float">
            <text:p>2.60899999999992</text:p>
          </table:table-cell>
        </table:table-row>
        <table:table-row table:style-name="ro1">
          <table:table-cell office:value-type="float" office:value="1136.463" calcext:value-type="float">
            <text:p>1136.463</text:p>
          </table:table-cell>
          <table:table-cell office:value-type="float" office:value="1139.355" calcext:value-type="float">
            <text:p>1139.355</text:p>
          </table:table-cell>
          <table:table-cell office:value-type="float" office:value="95" calcext:value-type="float">
            <text:p>95</text:p>
          </table:table-cell>
          <table:table-cell table:formula="of:=[.B96]-[.A96]" office:value-type="float" office:value="2.89200000000005" calcext:value-type="float">
            <text:p>2.89200000000005</text:p>
          </table:table-cell>
        </table:table-row>
        <table:table-row table:style-name="ro1">
          <table:table-cell office:value-type="float" office:value="1148.816" calcext:value-type="float">
            <text:p>1148.816</text:p>
          </table:table-cell>
          <table:table-cell office:value-type="float" office:value="1149.94" calcext:value-type="float">
            <text:p>1149.94</text:p>
          </table:table-cell>
          <table:table-cell office:value-type="float" office:value="96" calcext:value-type="float">
            <text:p>96</text:p>
          </table:table-cell>
          <table:table-cell table:formula="of:=[.B97]-[.A97]" office:value-type="float" office:value="1.12400000000002" calcext:value-type="float">
            <text:p>1.12400000000002</text:p>
          </table:table-cell>
        </table:table-row>
        <table:table-row table:style-name="ro1">
          <table:table-cell office:value-type="string" calcext:value-type="string">
            <text:p>1149.43</text:p>
          </table:table-cell>
          <table:table-cell office:value-type="float" office:value="1150.126" calcext:value-type="float">
            <text:p>1150.126</text:p>
          </table:table-cell>
          <table:table-cell office:value-type="float" office:value="97" calcext:value-type="float">
            <text:p>97</text:p>
          </table:table-cell>
          <table:table-cell table:formula="of:=[.B98]-[.A98]" office:value-type="float" office:value="0.695999999999913" calcext:value-type="float">
            <text:p>0.695999999999913</text:p>
          </table:table-cell>
        </table:table-row>
        <table:table-row table:style-name="ro1">
          <table:table-cell office:value-type="float" office:value="1176.188" calcext:value-type="float">
            <text:p>1176.188</text:p>
          </table:table-cell>
          <table:table-cell office:value-type="float" office:value="1177.036" calcext:value-type="float">
            <text:p>1177.036</text:p>
          </table:table-cell>
          <table:table-cell office:value-type="float" office:value="98" calcext:value-type="float">
            <text:p>98</text:p>
          </table:table-cell>
          <table:table-cell table:formula="of:=[.B99]-[.A99]" office:value-type="float" office:value="0.847999999999956" calcext:value-type="float">
            <text:p>0.847999999999956</text:p>
          </table:table-cell>
        </table:table-row>
        <table:table-row table:style-name="ro1">
          <table:table-cell office:value-type="float" office:value="1176.871" calcext:value-type="float">
            <text:p>1176.871</text:p>
          </table:table-cell>
          <table:table-cell office:value-type="float" office:value="1177.322" calcext:value-type="float">
            <text:p>1177.322</text:p>
          </table:table-cell>
          <table:table-cell office:value-type="float" office:value="99" calcext:value-type="float">
            <text:p>99</text:p>
          </table:table-cell>
          <table:table-cell table:formula="of:=[.B100]-[.A100]" office:value-type="float" office:value="0.450999999999794" calcext:value-type="float">
            <text:p>0.450999999999794</text:p>
          </table:table-cell>
        </table:table-row>
        <table:table-row table:style-name="ro1">
          <table:table-cell office:value-type="float" office:value="1202.331" calcext:value-type="float">
            <text:p>1202.331</text:p>
          </table:table-cell>
          <table:table-cell office:value-type="float" office:value="1207.134" calcext:value-type="float">
            <text:p>1207.134</text:p>
          </table:table-cell>
          <table:table-cell office:value-type="float" office:value="100" calcext:value-type="float">
            <text:p>100</text:p>
          </table:table-cell>
          <table:table-cell table:formula="of:=[.B101]-[.A101]" office:value-type="float" office:value="4.80300000000011" calcext:value-type="float">
            <text:p>4.80300000000011</text:p>
          </table:table-cell>
        </table:table-row>
        <table:table-row table:style-name="ro1">
          <table:table-cell office:value-type="float" office:value="1205.347" calcext:value-type="float">
            <text:p>1205.347</text:p>
          </table:table-cell>
          <table:table-cell office:value-type="float" office:value="1208.667" calcext:value-type="float">
            <text:p>1208.667</text:p>
          </table:table-cell>
          <table:table-cell office:value-type="float" office:value="101" calcext:value-type="float">
            <text:p>101</text:p>
          </table:table-cell>
          <table:table-cell table:formula="of:=[.B102]-[.A102]" office:value-type="float" office:value="3.31999999999994" calcext:value-type="float">
            <text:p>3.31999999999994</text:p>
          </table:table-cell>
        </table:table-row>
        <table:table-row table:style-name="ro1">
          <table:table-cell office:value-type="float" office:value="1253.177" calcext:value-type="float">
            <text:p>1253.177</text:p>
          </table:table-cell>
          <table:table-cell office:value-type="float" office:value="1249.941" calcext:value-type="float">
            <text:p>1249.941</text:p>
          </table:table-cell>
          <table:table-cell office:value-type="float" office:value="102" calcext:value-type="float">
            <text:p>102</text:p>
          </table:table-cell>
          <table:table-cell table:formula="of:=[.B103]-[.A103]" office:value-type="float" office:value="-3.23599999999988" calcext:value-type="float">
            <text:p>-3.23599999999988</text:p>
          </table:table-cell>
        </table:table-row>
        <table:table-row table:style-name="ro1">
          <table:table-cell office:value-type="float" office:value="1255.395" calcext:value-type="float">
            <text:p>1255.395</text:p>
          </table:table-cell>
          <table:table-cell office:value-type="float" office:value="1250.824" calcext:value-type="float">
            <text:p>1250.824</text:p>
          </table:table-cell>
          <table:table-cell office:value-type="float" office:value="103" calcext:value-type="float">
            <text:p>103</text:p>
          </table:table-cell>
          <table:table-cell table:formula="of:=[.B104]-[.A104]" office:value-type="float" office:value="-4.57099999999991" calcext:value-type="float">
            <text:p>-4.57099999999991</text:p>
          </table:table-cell>
        </table:table-row>
        <table:table-row table:style-name="ro1">
          <table:table-cell office:value-type="float" office:value="1270.748" calcext:value-type="float">
            <text:p>1270.748</text:p>
          </table:table-cell>
          <table:table-cell office:value-type="float" office:value="1271.965" calcext:value-type="float">
            <text:p>1271.965</text:p>
          </table:table-cell>
          <table:table-cell office:value-type="float" office:value="104" calcext:value-type="float">
            <text:p>104</text:p>
          </table:table-cell>
          <table:table-cell table:formula="of:=[.B105]-[.A105]" office:value-type="float" office:value="1.21699999999987" calcext:value-type="float">
            <text:p>1.21699999999987</text:p>
          </table:table-cell>
        </table:table-row>
        <table:table-row table:style-name="ro1">
          <table:table-cell office:value-type="float" office:value="1275.665" calcext:value-type="float">
            <text:p>1275.665</text:p>
          </table:table-cell>
          <table:table-cell office:value-type="float" office:value="1274.068" calcext:value-type="float">
            <text:p>1274.068</text:p>
          </table:table-cell>
          <table:table-cell office:value-type="float" office:value="105" calcext:value-type="float">
            <text:p>105</text:p>
          </table:table-cell>
          <table:table-cell table:formula="of:=[.B106]-[.A106]" office:value-type="float" office:value="-1.59699999999998" calcext:value-type="float">
            <text:p>-1.59699999999998</text:p>
          </table:table-cell>
        </table:table-row>
        <table:table-row table:style-name="ro1">
          <table:table-cell office:value-type="float" office:value="1331.192" calcext:value-type="float">
            <text:p>1331.192</text:p>
          </table:table-cell>
          <table:table-cell office:value-type="float" office:value="1332.782" calcext:value-type="float">
            <text:p>1332.782</text:p>
          </table:table-cell>
          <table:table-cell office:value-type="float" office:value="106" calcext:value-type="float">
            <text:p>106</text:p>
          </table:table-cell>
          <table:table-cell table:formula="of:=[.B107]-[.A107]" office:value-type="float" office:value="1.58999999999992" calcext:value-type="float">
            <text:p>1.58999999999992</text:p>
          </table:table-cell>
        </table:table-row>
        <table:table-row table:style-name="ro1">
          <table:table-cell office:value-type="float" office:value="1335.085" calcext:value-type="float">
            <text:p>1335.085</text:p>
          </table:table-cell>
          <table:table-cell office:value-type="float" office:value="1330.373" calcext:value-type="float">
            <text:p>1330.373</text:p>
          </table:table-cell>
          <table:table-cell office:value-type="float" office:value="107" calcext:value-type="float">
            <text:p>107</text:p>
          </table:table-cell>
          <table:table-cell table:formula="of:=[.B108]-[.A108]" office:value-type="float" office:value="-4.71199999999999" calcext:value-type="float">
            <text:p>-4.71199999999999</text:p>
          </table:table-cell>
        </table:table-row>
        <table:table-row table:style-name="ro1">
          <table:table-cell office:value-type="float" office:value="1338.125" calcext:value-type="float">
            <text:p>1338.125</text:p>
          </table:table-cell>
          <table:table-cell office:value-type="float" office:value="1328.97" calcext:value-type="float">
            <text:p>1328.97</text:p>
          </table:table-cell>
          <table:table-cell office:value-type="float" office:value="108" calcext:value-type="float">
            <text:p>108</text:p>
          </table:table-cell>
          <table:table-cell table:formula="of:=[.B109]-[.A109]" office:value-type="float" office:value="-9.15499999999997" calcext:value-type="float">
            <text:p>-9.15499999999997</text:p>
          </table:table-cell>
        </table:table-row>
        <table:table-row table:style-name="ro1">
          <table:table-cell office:value-type="float" office:value="1338.288" calcext:value-type="float">
            <text:p>1338.288</text:p>
          </table:table-cell>
          <table:table-cell office:value-type="float" office:value="1340.838" calcext:value-type="float">
            <text:p>1340.838</text:p>
          </table:table-cell>
          <table:table-cell office:value-type="float" office:value="109" calcext:value-type="float">
            <text:p>109</text:p>
          </table:table-cell>
          <table:table-cell table:formula="of:=[.B110]-[.A110]" office:value-type="float" office:value="2.54999999999995" calcext:value-type="float">
            <text:p>2.54999999999995</text:p>
          </table:table-cell>
        </table:table-row>
        <table:table-row table:style-name="ro1">
          <table:table-cell office:value-type="float" office:value="1359.741" calcext:value-type="float">
            <text:p>1359.741</text:p>
          </table:table-cell>
          <table:table-cell office:value-type="float" office:value="1379.937" calcext:value-type="float">
            <text:p>1379.937</text:p>
          </table:table-cell>
          <table:table-cell office:value-type="float" office:value="110" calcext:value-type="float">
            <text:p>110</text:p>
          </table:table-cell>
          <table:table-cell table:formula="of:=[.B111]-[.A111]" office:value-type="float" office:value="20.1959999999999" calcext:value-type="float">
            <text:p>20.1959999999999</text:p>
          </table:table-cell>
        </table:table-row>
        <table:table-row table:style-name="ro1">
          <table:table-cell office:value-type="float" office:value="1362.631" calcext:value-type="float">
            <text:p>1362.631</text:p>
          </table:table-cell>
          <table:table-cell office:value-type="float" office:value="1369.779" calcext:value-type="float">
            <text:p>1369.779</text:p>
          </table:table-cell>
          <table:table-cell office:value-type="float" office:value="111" calcext:value-type="float">
            <text:p>111</text:p>
          </table:table-cell>
          <table:table-cell table:formula="of:=[.B112]-[.A112]" office:value-type="float" office:value="7.14799999999991" calcext:value-type="float">
            <text:p>7.14799999999991</text:p>
          </table:table-cell>
        </table:table-row>
        <table:table-row table:style-name="ro1">
          <table:table-cell office:value-type="float" office:value="1396.028" calcext:value-type="float">
            <text:p>1396.028</text:p>
          </table:table-cell>
          <table:table-cell office:value-type="float" office:value="1401.349" calcext:value-type="float">
            <text:p>1401.349</text:p>
          </table:table-cell>
          <table:table-cell office:value-type="float" office:value="112" calcext:value-type="float">
            <text:p>112</text:p>
          </table:table-cell>
          <table:table-cell table:formula="of:=[.B113]-[.A113]" office:value-type="float" office:value="5.32099999999991" calcext:value-type="float">
            <text:p>5.32099999999991</text:p>
          </table:table-cell>
        </table:table-row>
        <table:table-row table:style-name="ro1">
          <table:table-cell office:value-type="float" office:value="1404.451" calcext:value-type="float">
            <text:p>1404.451</text:p>
          </table:table-cell>
          <table:table-cell office:value-type="float" office:value="1405.412" calcext:value-type="float">
            <text:p>1405.412</text:p>
          </table:table-cell>
          <table:table-cell office:value-type="float" office:value="113" calcext:value-type="float">
            <text:p>113</text:p>
          </table:table-cell>
          <table:table-cell table:formula="of:=[.B114]-[.A114]" office:value-type="float" office:value="0.961000000000013" calcext:value-type="float">
            <text:p>0.961000000000013</text:p>
          </table:table-cell>
        </table:table-row>
        <table:table-row table:style-name="ro1">
          <table:table-cell office:value-type="float" office:value="1404.619" calcext:value-type="float">
            <text:p>1404.619</text:p>
          </table:table-cell>
          <table:table-cell office:value-type="float" office:value="1401.026" calcext:value-type="float">
            <text:p>1401.026</text:p>
          </table:table-cell>
          <table:table-cell office:value-type="float" office:value="114" calcext:value-type="float">
            <text:p>114</text:p>
          </table:table-cell>
          <table:table-cell table:formula="of:=[.B115]-[.A115]" office:value-type="float" office:value="-3.59299999999985" calcext:value-type="float">
            <text:p>-3.59299999999985</text:p>
          </table:table-cell>
        </table:table-row>
        <table:table-row table:style-name="ro1">
          <table:table-cell office:value-type="float" office:value="1407.611" calcext:value-type="float">
            <text:p>1407.611</text:p>
          </table:table-cell>
          <table:table-cell office:value-type="float" office:value="1409.65" calcext:value-type="float">
            <text:p>1409.65</text:p>
          </table:table-cell>
          <table:table-cell office:value-type="float" office:value="115" calcext:value-type="float">
            <text:p>115</text:p>
          </table:table-cell>
          <table:table-cell table:formula="of:=[.B116]-[.A116]" office:value-type="float" office:value="2.03899999999999" calcext:value-type="float">
            <text:p>2.03899999999999</text:p>
          </table:table-cell>
        </table:table-row>
        <table:table-row table:style-name="ro1">
          <table:table-cell office:value-type="float" office:value="1416.513" calcext:value-type="float">
            <text:p>1416.513</text:p>
          </table:table-cell>
          <table:table-cell office:value-type="float" office:value="1419.563" calcext:value-type="float">
            <text:p>1419.563</text:p>
          </table:table-cell>
          <table:table-cell office:value-type="float" office:value="116" calcext:value-type="float">
            <text:p>116</text:p>
          </table:table-cell>
          <table:table-cell table:formula="of:=[.B117]-[.A117]" office:value-type="float" office:value="3.05000000000018" calcext:value-type="float">
            <text:p>3.05000000000018</text:p>
          </table:table-cell>
        </table:table-row>
        <table:table-row table:style-name="ro1">
          <table:table-cell office:value-type="float" office:value="1417.04" calcext:value-type="float">
            <text:p>1417.04</text:p>
          </table:table-cell>
          <table:table-cell office:value-type="float" office:value="1419.589" calcext:value-type="float">
            <text:p>1419.589</text:p>
          </table:table-cell>
          <table:table-cell office:value-type="float" office:value="117" calcext:value-type="float">
            <text:p>117</text:p>
          </table:table-cell>
          <table:table-cell table:formula="of:=[.B118]-[.A118]" office:value-type="float" office:value="2.54899999999998" calcext:value-type="float">
            <text:p>2.54899999999998</text:p>
          </table:table-cell>
        </table:table-row>
        <table:table-row table:style-name="ro1">
          <table:table-cell office:value-type="float" office:value="1481.21" calcext:value-type="float">
            <text:p>1481.21</text:p>
          </table:table-cell>
          <table:table-cell office:value-type="float" office:value="1484.699" calcext:value-type="float">
            <text:p>1484.699</text:p>
          </table:table-cell>
          <table:table-cell office:value-type="float" office:value="118" calcext:value-type="float">
            <text:p>118</text:p>
          </table:table-cell>
          <table:table-cell table:formula="of:=[.B119]-[.A119]" office:value-type="float" office:value="3.48900000000003" calcext:value-type="float">
            <text:p>3.48900000000003</text:p>
          </table:table-cell>
        </table:table-row>
        <table:table-row table:style-name="ro1">
          <table:table-cell office:value-type="float" office:value="1481.696" calcext:value-type="float">
            <text:p>1481.696</text:p>
          </table:table-cell>
          <table:table-cell office:value-type="float" office:value="1487.177" calcext:value-type="float">
            <text:p>1487.177</text:p>
          </table:table-cell>
          <table:table-cell office:value-type="float" office:value="119" calcext:value-type="float">
            <text:p>119</text:p>
          </table:table-cell>
          <table:table-cell table:formula="of:=[.B120]-[.A120]" office:value-type="float" office:value="5.48099999999999" calcext:value-type="float">
            <text:p>5.48099999999999</text:p>
          </table:table-cell>
        </table:table-row>
        <table:table-row table:style-name="ro1">
          <table:table-cell office:value-type="float" office:value="1493.271" calcext:value-type="float">
            <text:p>1493.271</text:p>
          </table:table-cell>
          <table:table-cell office:value-type="float" office:value="1494.429" calcext:value-type="float">
            <text:p>1494.429</text:p>
          </table:table-cell>
          <table:table-cell office:value-type="float" office:value="120" calcext:value-type="float">
            <text:p>120</text:p>
          </table:table-cell>
          <table:table-cell table:formula="of:=[.B121]-[.A121]" office:value-type="float" office:value="1.15800000000013" calcext:value-type="float">
            <text:p>1.15800000000013</text:p>
          </table:table-cell>
        </table:table-row>
        <table:table-row table:style-name="ro1">
          <table:table-cell office:value-type="float" office:value="1493.337" calcext:value-type="float">
            <text:p>1493.337</text:p>
          </table:table-cell>
          <table:table-cell office:value-type="float" office:value="1493.685" calcext:value-type="float">
            <text:p>1493.685</text:p>
          </table:table-cell>
          <table:table-cell office:value-type="float" office:value="121" calcext:value-type="float">
            <text:p>121</text:p>
          </table:table-cell>
          <table:table-cell table:formula="of:=[.B122]-[.A122]" office:value-type="float" office:value="0.347999999999956" calcext:value-type="float">
            <text:p>0.347999999999956</text:p>
          </table:table-cell>
        </table:table-row>
        <table:table-row table:style-name="ro1">
          <table:table-cell office:value-type="float" office:value="1511.46" calcext:value-type="float">
            <text:p>1511.46</text:p>
          </table:table-cell>
          <table:table-cell office:value-type="float" office:value="1513.175" calcext:value-type="float">
            <text:p>1513.175</text:p>
          </table:table-cell>
          <table:table-cell office:value-type="float" office:value="122" calcext:value-type="float">
            <text:p>122</text:p>
          </table:table-cell>
          <table:table-cell table:formula="of:=[.B123]-[.A123]" office:value-type="float" office:value="1.71499999999992" calcext:value-type="float">
            <text:p>1.71499999999992</text:p>
          </table:table-cell>
        </table:table-row>
        <table:table-row table:style-name="ro1">
          <table:table-cell office:value-type="float" office:value="1514.945" calcext:value-type="float">
            <text:p>1514.945</text:p>
          </table:table-cell>
          <table:table-cell office:value-type="float" office:value="1516.373" calcext:value-type="float">
            <text:p>1516.373</text:p>
          </table:table-cell>
          <table:table-cell office:value-type="float" office:value="123" calcext:value-type="float">
            <text:p>123</text:p>
          </table:table-cell>
          <table:table-cell table:formula="of:=[.B124]-[.A124]" office:value-type="float" office:value="1.42800000000011" calcext:value-type="float">
            <text:p>1.42800000000011</text:p>
          </table:table-cell>
        </table:table-row>
        <table:table-row table:style-name="ro1">
          <table:table-cell office:value-type="float" office:value="1538.086" calcext:value-type="float">
            <text:p>1538.086</text:p>
          </table:table-cell>
          <table:table-cell office:value-type="float" office:value="1539.88" calcext:value-type="float">
            <text:p>1539.88</text:p>
          </table:table-cell>
          <table:table-cell office:value-type="float" office:value="124" calcext:value-type="float">
            <text:p>124</text:p>
          </table:table-cell>
          <table:table-cell table:formula="of:=[.B125]-[.A125]" office:value-type="float" office:value="1.7940000000001" calcext:value-type="float">
            <text:p>1.7940000000001</text:p>
          </table:table-cell>
        </table:table-row>
        <table:table-row table:style-name="ro1">
          <table:table-cell office:value-type="float" office:value="1550.293" calcext:value-type="float">
            <text:p>1550.293</text:p>
          </table:table-cell>
          <table:table-cell office:value-type="float" office:value="1555.445" calcext:value-type="float">
            <text:p>1555.445</text:p>
          </table:table-cell>
          <table:table-cell office:value-type="float" office:value="125" calcext:value-type="float">
            <text:p>125</text:p>
          </table:table-cell>
          <table:table-cell table:formula="of:=[.B126]-[.A126]" office:value-type="float" office:value="5.15200000000004" calcext:value-type="float">
            <text:p>5.15200000000004</text:p>
          </table:table-cell>
        </table:table-row>
        <table:table-row table:style-name="ro1">
          <table:table-cell office:value-type="float" office:value="1584.587" calcext:value-type="float">
            <text:p>1584.587</text:p>
          </table:table-cell>
          <table:table-cell office:value-type="float" office:value="1579.72" calcext:value-type="float">
            <text:p>1579.72</text:p>
          </table:table-cell>
          <table:table-cell office:value-type="float" office:value="126" calcext:value-type="float">
            <text:p>126</text:p>
          </table:table-cell>
          <table:table-cell table:formula="of:=[.B127]-[.A127]" office:value-type="float" office:value="-4.86699999999996" calcext:value-type="float">
            <text:p>-4.86699999999996</text:p>
          </table:table-cell>
        </table:table-row>
        <table:table-row table:style-name="ro1">
          <table:table-cell office:value-type="float" office:value="1585.574" calcext:value-type="float">
            <text:p>1585.574</text:p>
          </table:table-cell>
          <table:table-cell office:value-type="float" office:value="1580.843" calcext:value-type="float">
            <text:p>1580.843</text:p>
          </table:table-cell>
          <table:table-cell office:value-type="float" office:value="127" calcext:value-type="float">
            <text:p>127</text:p>
          </table:table-cell>
          <table:table-cell table:formula="of:=[.B128]-[.A128]" office:value-type="float" office:value="-4.73099999999999" calcext:value-type="float">
            <text:p>-4.73099999999999</text:p>
          </table:table-cell>
        </table:table-row>
        <table:table-row table:style-name="ro1">
          <table:table-cell office:value-type="float" office:value="1619.528" calcext:value-type="float">
            <text:p>1619.528</text:p>
          </table:table-cell>
          <table:table-cell office:value-type="float" office:value="1614.515" calcext:value-type="float">
            <text:p>1614.515</text:p>
          </table:table-cell>
          <table:table-cell office:value-type="float" office:value="128" calcext:value-type="float">
            <text:p>128</text:p>
          </table:table-cell>
          <table:table-cell table:formula="of:=[.B129]-[.A129]" office:value-type="float" office:value="-5.01299999999992" calcext:value-type="float">
            <text:p>-5.01299999999992</text:p>
          </table:table-cell>
        </table:table-row>
        <table:table-row table:style-name="ro1">
          <table:table-cell office:value-type="float" office:value="1621.108" calcext:value-type="float">
            <text:p>1621.108</text:p>
          </table:table-cell>
          <table:table-cell office:value-type="float" office:value="1617.912" calcext:value-type="float">
            <text:p>1617.912</text:p>
          </table:table-cell>
          <table:table-cell office:value-type="float" office:value="129" calcext:value-type="float">
            <text:p>129</text:p>
          </table:table-cell>
          <table:table-cell table:formula="of:=[.B130]-[.A130]" office:value-type="float" office:value="-3.19599999999991" calcext:value-type="float">
            <text:p>-3.19599999999991</text:p>
          </table:table-cell>
        </table:table-row>
        <table:table-row table:style-name="ro1">
          <table:table-cell office:value-type="float" office:value="1646.403" calcext:value-type="float">
            <text:p>1646.403</text:p>
          </table:table-cell>
          <table:table-cell office:value-type="float" office:value="1651.613" calcext:value-type="float">
            <text:p>1651.613</text:p>
          </table:table-cell>
          <table:table-cell office:value-type="float" office:value="130" calcext:value-type="float">
            <text:p>130</text:p>
          </table:table-cell>
          <table:table-cell table:formula="of:=[.B131]-[.A131]" office:value-type="float" office:value="5.21000000000004" calcext:value-type="float">
            <text:p>5.21000000000004</text:p>
          </table:table-cell>
        </table:table-row>
        <table:table-row table:style-name="ro1">
          <table:table-cell office:value-type="float" office:value="1648.013" calcext:value-type="float">
            <text:p>1648.013</text:p>
          </table:table-cell>
          <table:table-cell office:value-type="float" office:value="1651.883" calcext:value-type="float">
            <text:p>1651.883</text:p>
          </table:table-cell>
          <table:table-cell office:value-type="float" office:value="131" calcext:value-type="float">
            <text:p>131</text:p>
          </table:table-cell>
          <table:table-cell table:formula="of:=[.B132]-[.A132]" office:value-type="float" office:value="3.87000000000012" calcext:value-type="float">
            <text:p>3.87000000000012</text:p>
          </table:table-cell>
        </table:table-row>
        <table:table-row table:style-name="ro1">
          <table:table-cell office:value-type="float" office:value="1660.354" calcext:value-type="float">
            <text:p>1660.354</text:p>
          </table:table-cell>
          <table:table-cell office:value-type="float" office:value="1661.637" calcext:value-type="float">
            <text:p>1661.637</text:p>
          </table:table-cell>
          <table:table-cell office:value-type="float" office:value="132" calcext:value-type="float">
            <text:p>132</text:p>
          </table:table-cell>
          <table:table-cell table:formula="of:=[.B133]-[.A133]" office:value-type="float" office:value="1.2829999999999" calcext:value-type="float">
            <text:p>1.2829999999999</text:p>
          </table:table-cell>
        </table:table-row>
        <table:table-row table:style-name="ro1">
          <table:table-cell office:value-type="float" office:value="1661.534" calcext:value-type="float">
            <text:p>1661.534</text:p>
          </table:table-cell>
          <table:table-cell office:value-type="float" office:value="1662.351" calcext:value-type="float">
            <text:p>1662.351</text:p>
          </table:table-cell>
          <table:table-cell office:value-type="float" office:value="133" calcext:value-type="float">
            <text:p>133</text:p>
          </table:table-cell>
          <table:table-cell table:formula="of:=[.B134]-[.A134]" office:value-type="float" office:value="0.817000000000007" calcext:value-type="float">
            <text:p>0.817000000000007</text:p>
          </table:table-cell>
        </table:table-row>
        <table:table-row table:style-name="ro1">
          <table:table-cell office:value-type="float" office:value="1666.801" calcext:value-type="float">
            <text:p>1666.801</text:p>
          </table:table-cell>
          <table:table-cell office:value-type="float" office:value="1675.77" calcext:value-type="float">
            <text:p>1675.77</text:p>
          </table:table-cell>
          <table:table-cell office:value-type="float" office:value="134" calcext:value-type="float">
            <text:p>134</text:p>
          </table:table-cell>
          <table:table-cell table:formula="of:=[.B135]-[.A135]" office:value-type="float" office:value="8.96900000000005" calcext:value-type="float">
            <text:p>8.96900000000005</text:p>
          </table:table-cell>
        </table:table-row>
        <table:table-row table:style-name="ro1">
          <table:table-cell office:value-type="float" office:value="1668.211" calcext:value-type="float">
            <text:p>1668.211</text:p>
          </table:table-cell>
          <table:table-cell office:value-type="float" office:value="1679.874" calcext:value-type="float">
            <text:p>1679.874</text:p>
          </table:table-cell>
          <table:table-cell office:value-type="float" office:value="135" calcext:value-type="float">
            <text:p>135</text:p>
          </table:table-cell>
          <table:table-cell table:formula="of:=[.B136]-[.A136]" office:value-type="float" office:value="11.663" calcext:value-type="float">
            <text:p>11.663</text:p>
          </table:table-cell>
        </table:table-row>
        <table:table-row table:style-name="ro1">
          <table:table-cell office:value-type="float" office:value="1682.031" calcext:value-type="float">
            <text:p>1682.031</text:p>
          </table:table-cell>
          <table:table-cell office:value-type="float" office:value="1713.112" calcext:value-type="float">
            <text:p>1713.112</text:p>
          </table:table-cell>
          <table:table-cell office:value-type="float" office:value="136" calcext:value-type="float">
            <text:p>136</text:p>
          </table:table-cell>
          <table:table-cell table:formula="of:=[.B137]-[.A137]" office:value-type="float" office:value="31.0810000000001" calcext:value-type="float">
            <text:p>31.0810000000001</text:p>
          </table:table-cell>
        </table:table-row>
        <table:table-row table:style-name="ro1">
          <table:table-cell office:value-type="float" office:value="1682.522" calcext:value-type="float">
            <text:p>1682.522</text:p>
          </table:table-cell>
          <table:table-cell office:value-type="float" office:value="1715.655" calcext:value-type="float">
            <text:p>1715.655</text:p>
          </table:table-cell>
          <table:table-cell office:value-type="float" office:value="137" calcext:value-type="float">
            <text:p>137</text:p>
          </table:table-cell>
          <table:table-cell table:formula="of:=[.B138]-[.A138]" office:value-type="float" office:value="33.133" calcext:value-type="float">
            <text:p>33.133</text:p>
          </table:table-cell>
        </table:table-row>
        <table:table-row table:style-name="ro1">
          <table:table-cell office:value-type="float" office:value="3130.072" calcext:value-type="float">
            <text:p>3130.072</text:p>
          </table:table-cell>
          <table:table-cell office:value-type="float" office:value="3180.515" calcext:value-type="float">
            <text:p>3180.515</text:p>
          </table:table-cell>
          <table:table-cell office:value-type="float" office:value="138" calcext:value-type="float">
            <text:p>138</text:p>
          </table:table-cell>
          <table:table-cell table:formula="of:=[.B139]-[.A139]" office:value-type="float" office:value="50.4429999999998" calcext:value-type="float">
            <text:p>50.4429999999998</text:p>
          </table:table-cell>
        </table:table-row>
        <table:table-row table:style-name="ro1">
          <table:table-cell office:value-type="float" office:value="3130.112" calcext:value-type="float">
            <text:p>3130.112</text:p>
          </table:table-cell>
          <table:table-cell office:value-type="float" office:value="3180.517" calcext:value-type="float">
            <text:p>3180.517</text:p>
          </table:table-cell>
          <table:table-cell office:value-type="float" office:value="139" calcext:value-type="float">
            <text:p>139</text:p>
          </table:table-cell>
          <table:table-cell table:formula="of:=[.B140]-[.A140]" office:value-type="float" office:value="50.4049999999997" calcext:value-type="float">
            <text:p>50.4049999999997</text:p>
          </table:table-cell>
        </table:table-row>
        <table:table-row table:style-name="ro1">
          <table:table-cell office:value-type="float" office:value="3197.56" calcext:value-type="float">
            <text:p>3197.56</text:p>
          </table:table-cell>
          <table:table-cell office:value-type="float" office:value="3208.911" calcext:value-type="float">
            <text:p>3208.911</text:p>
          </table:table-cell>
          <table:table-cell office:value-type="float" office:value="140" calcext:value-type="float">
            <text:p>140</text:p>
          </table:table-cell>
          <table:table-cell table:formula="of:=[.B141]-[.A141]" office:value-type="float" office:value="11.3510000000001" calcext:value-type="float">
            <text:p>11.3510000000001</text:p>
          </table:table-cell>
        </table:table-row>
        <table:table-row table:style-name="ro1">
          <table:table-cell office:value-type="float" office:value="3197.64" calcext:value-type="float">
            <text:p>3197.64</text:p>
          </table:table-cell>
          <table:table-cell office:value-type="float" office:value="3208.843" calcext:value-type="float">
            <text:p>3208.843</text:p>
          </table:table-cell>
          <table:table-cell office:value-type="float" office:value="141" calcext:value-type="float">
            <text:p>141</text:p>
          </table:table-cell>
          <table:table-cell table:formula="of:=[.B142]-[.A142]" office:value-type="float" office:value="11.203" calcext:value-type="float">
            <text:p>11.203</text:p>
          </table:table-cell>
        </table:table-row>
        <table:table-row table:style-name="ro1">
          <table:table-cell office:value-type="float" office:value="3204.329" calcext:value-type="float">
            <text:p>3204.329</text:p>
          </table:table-cell>
          <table:table-cell office:value-type="float" office:value="3208.841" calcext:value-type="float">
            <text:p>3208.841</text:p>
          </table:table-cell>
          <table:table-cell office:value-type="float" office:value="142" calcext:value-type="float">
            <text:p>142</text:p>
          </table:table-cell>
          <table:table-cell table:formula="of:=[.B143]-[.A143]" office:value-type="float" office:value="4.51199999999972" calcext:value-type="float">
            <text:p>4.51199999999972</text:p>
          </table:table-cell>
        </table:table-row>
        <table:table-row table:style-name="ro1">
          <table:table-cell office:value-type="float" office:value="3204.373" calcext:value-type="float">
            <text:p>3204.373</text:p>
          </table:table-cell>
          <table:table-cell office:value-type="float" office:value="3208.839" calcext:value-type="float">
            <text:p>3208.839</text:p>
          </table:table-cell>
          <table:table-cell office:value-type="float" office:value="143" calcext:value-type="float">
            <text:p>143</text:p>
          </table:table-cell>
          <table:table-cell table:formula="of:=[.B144]-[.A144]" office:value-type="float" office:value="4.46599999999989" calcext:value-type="float">
            <text:p>4.46599999999989</text:p>
          </table:table-cell>
        </table:table-row>
        <table:table-row table:style-name="ro1">
          <table:table-cell office:value-type="float" office:value="3217.191" calcext:value-type="float">
            <text:p>3217.191</text:p>
          </table:table-cell>
          <table:table-cell office:value-type="float" office:value="3221.756" calcext:value-type="float">
            <text:p>3221.756</text:p>
          </table:table-cell>
          <table:table-cell office:value-type="float" office:value="144" calcext:value-type="float">
            <text:p>144</text:p>
          </table:table-cell>
          <table:table-cell table:formula="of:=[.B145]-[.A145]" office:value-type="float" office:value="4.56500000000006" calcext:value-type="float">
            <text:p>4.56500000000006</text:p>
          </table:table-cell>
        </table:table-row>
        <table:table-row table:style-name="ro1">
          <table:table-cell office:value-type="float" office:value="3217.208" calcext:value-type="float">
            <text:p>3217.208</text:p>
          </table:table-cell>
          <table:table-cell office:value-type="float" office:value="3221.709" calcext:value-type="float">
            <text:p>3221.709</text:p>
          </table:table-cell>
          <table:table-cell office:value-type="float" office:value="145" calcext:value-type="float">
            <text:p>145</text:p>
          </table:table-cell>
          <table:table-cell table:formula="of:=[.B146]-[.A146]" office:value-type="float" office:value="4.50099999999975" calcext:value-type="float">
            <text:p>4.50099999999975</text:p>
          </table:table-cell>
        </table:table-row>
        <table:table-row table:style-name="ro1">
          <table:table-cell office:value-type="float" office:value="3217.46" calcext:value-type="float">
            <text:p>3217.46</text:p>
          </table:table-cell>
          <table:table-cell office:value-type="float" office:value="3218.215" calcext:value-type="float">
            <text:p>3218.215</text:p>
          </table:table-cell>
          <table:table-cell office:value-type="float" office:value="146" calcext:value-type="float">
            <text:p>146</text:p>
          </table:table-cell>
          <table:table-cell table:formula="of:=[.B147]-[.A147]" office:value-type="float" office:value="0.755000000000109" calcext:value-type="float">
            <text:p>0.755000000000109</text:p>
          </table:table-cell>
        </table:table-row>
        <table:table-row table:style-name="ro1">
          <table:table-cell office:value-type="float" office:value="3217.474" calcext:value-type="float">
            <text:p>3217.474</text:p>
          </table:table-cell>
          <table:table-cell office:value-type="float" office:value="3218.249" calcext:value-type="float">
            <text:p>3218.249</text:p>
          </table:table-cell>
          <table:table-cell office:value-type="float" office:value="147" calcext:value-type="float">
            <text:p>147</text:p>
          </table:table-cell>
          <table:table-cell table:formula="of:=[.B148]-[.A148]" office:value-type="float" office:value="0.774999999999636" calcext:value-type="float">
            <text:p>0.774999999999636</text:p>
          </table:table-cell>
        </table:table-row>
        <table:table-row table:style-name="ro1">
          <table:table-cell office:value-type="float" office:value="3226.078" calcext:value-type="float">
            <text:p>3226.078</text:p>
          </table:table-cell>
          <table:table-cell office:value-type="float" office:value="3229.939" calcext:value-type="float">
            <text:p>3229.939</text:p>
          </table:table-cell>
          <table:table-cell office:value-type="float" office:value="148" calcext:value-type="float">
            <text:p>148</text:p>
          </table:table-cell>
          <table:table-cell table:formula="of:=[.B149]-[.A149]" office:value-type="float" office:value="3.86099999999988" calcext:value-type="float">
            <text:p>3.86099999999988</text:p>
          </table:table-cell>
        </table:table-row>
        <table:table-row table:style-name="ro1">
          <table:table-cell office:value-type="float" office:value="3226.105" calcext:value-type="float">
            <text:p>3226.105</text:p>
          </table:table-cell>
          <table:table-cell office:value-type="float" office:value="3229.792" calcext:value-type="float">
            <text:p>3229.792</text:p>
          </table:table-cell>
          <table:table-cell office:value-type="float" office:value="149" calcext:value-type="float">
            <text:p>149</text:p>
          </table:table-cell>
          <table:table-cell table:formula="of:=[.B150]-[.A150]" office:value-type="float" office:value="3.6869999999999" calcext:value-type="float">
            <text:p>3.6869999999999</text:p>
          </table:table-cell>
        </table:table-row>
        <table:table-row table:style-name="ro1">
          <table:table-cell office:value-type="float" office:value="3231.031" calcext:value-type="float">
            <text:p>3231.031</text:p>
          </table:table-cell>
          <table:table-cell office:value-type="float" office:value="3233.982" calcext:value-type="float">
            <text:p>3233.982</text:p>
          </table:table-cell>
          <table:table-cell office:value-type="float" office:value="150" calcext:value-type="float">
            <text:p>150</text:p>
          </table:table-cell>
          <table:table-cell table:formula="of:=[.B151]-[.A151]" office:value-type="float" office:value="2.95100000000002" calcext:value-type="float">
            <text:p>2.95100000000002</text:p>
          </table:table-cell>
        </table:table-row>
        <table:table-row table:style-name="ro1">
          <table:table-cell office:value-type="float" office:value="3231.075" calcext:value-type="float">
            <text:p>3231.075</text:p>
          </table:table-cell>
          <table:table-cell office:value-type="float" office:value="3234.188" calcext:value-type="float">
            <text:p>3234.188</text:p>
          </table:table-cell>
          <table:table-cell office:value-type="float" office:value="151" calcext:value-type="float">
            <text:p>151</text:p>
          </table:table-cell>
          <table:table-cell table:formula="of:=[.B152]-[.A152]" office:value-type="float" office:value="3.11300000000028" calcext:value-type="float">
            <text:p>3.11300000000028</text:p>
          </table:table-cell>
        </table:table-row>
        <table:table-row table:style-name="ro1">
          <table:table-cell office:value-type="float" office:value="3236.905" calcext:value-type="float">
            <text:p>3236.905</text:p>
          </table:table-cell>
          <table:table-cell office:value-type="float" office:value="3238.249" calcext:value-type="float">
            <text:p>3238.249</text:p>
          </table:table-cell>
          <table:table-cell office:value-type="float" office:value="152" calcext:value-type="float">
            <text:p>152</text:p>
          </table:table-cell>
          <table:table-cell table:formula="of:=[.B153]-[.A153]" office:value-type="float" office:value="1.3439999999996" calcext:value-type="float">
            <text:p>1.3439999999996</text:p>
          </table:table-cell>
        </table:table-row>
        <table:table-row table:style-name="ro1">
          <table:table-cell office:value-type="float" office:value="3236.932" calcext:value-type="float">
            <text:p>3236.932</text:p>
          </table:table-cell>
          <table:table-cell office:value-type="float" office:value="3238.269" calcext:value-type="float">
            <text:p>3238.269</text:p>
          </table:table-cell>
          <table:table-cell office:value-type="float" office:value="153" calcext:value-type="float">
            <text:p>153</text:p>
          </table:table-cell>
          <table:table-cell table:formula="of:=[.B154]-[.A154]" office:value-type="float" office:value="1.33699999999999" calcext:value-type="float">
            <text:p>1.33699999999999</text:p>
          </table:table-cell>
        </table:table-row>
        <table:table-row table:style-name="ro1" table:number-rows-repeated="10484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atch_Eff" table:style-name="ta1">
        <table:shapes>
          <draw:frame draw:z-index="0" draw:style-name="gr1" draw:text-style-name="P1" svg:width="6.2925in" svg:height="3.5406in" svg:x="17.0866in" svg:y="2.7705in">
            <draw:object draw:notify-on-update-of-ranges="Match_Eff.R2:Match_Eff.R154 Match_Eff.S1:Match_Eff.S1 Match_Eff.S2:Match_Eff.S1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number-columns-repeated="14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HS_freq</text:p>
          </table:table-cell>
          <table:table-cell office:value-type="string" calcext:value-type="string">
            <text:p>LS_eff_freq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M3</text:p>
          </table:table-cell>
          <table:table-cell table:style-name="ce1" office:value-type="string" calcext:value-type="string">
            <text:p>M4</text:p>
          </table:table-cell>
          <table:table-cell table:style-name="ce1" office:value-type="string" calcext:value-type="string">
            <text:p>M5</text:p>
          </table:table-cell>
          <table:table-cell table:style-name="ce1" office:value-type="string" calcext:value-type="string">
            <text:p>M6</text:p>
          </table:table-cell>
          <table:table-cell table:style-name="ce1" office:value-type="string" calcext:value-type="string">
            <text:p>M7</text:p>
          </table:table-cell>
          <table:table-cell table:style-name="ce1" office:value-type="string" calcext:value-type="string">
            <text:p>M8</text:p>
          </table:table-cell>
          <table:table-cell table:style-name="ce1" office:value-type="string" calcext:value-type="string">
            <text:p>M9</text:p>
          </table:table-cell>
          <table:table-cell table:style-name="ce1" office:value-type="string" calcext:value-type="string">
            <text:p>M10</text:p>
          </table:table-cell>
          <table:table-cell table:style-name="ce1" office:value-type="string" calcext:value-type="string">
            <text:p>M11</text:p>
          </table:table-cell>
          <table:table-cell table:style-name="ce1" office:value-type="string" calcext:value-type="string">
            <text:p>M12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Dif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36" calcext:value-type="float">
            <text:p>14.636</text:p>
          </table:table-cell>
          <table:table-cell table:style-name="ce4" office:value-type="float" office:value="18.263" calcext:value-type="float">
            <text:p>18.2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"/>
          <table:table-cell table:number-columns-repeated="2"/>
          <table:table-cell office:value-type="float" office:value="1" calcext:value-type="float">
            <text:p>1</text:p>
          </table:table-cell>
          <table:table-cell table:formula="of:=[.C2]-[.B2]" office:value-type="float" office:value="3.627" calcext:value-type="float">
            <text:p>3.6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703" calcext:value-type="float">
            <text:p>17.703</text:p>
          </table:table-cell>
          <table:table-cell office:value-type="float" office:value="32.496" calcext:value-type="float">
            <text:p>32.4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10"/>
          <table:table-cell table:number-columns-repeated="2"/>
          <table:table-cell office:value-type="float" office:value="2" calcext:value-type="float">
            <text:p>2</text:p>
          </table:table-cell>
          <table:table-cell table:formula="of:=[.C3]-[.B3]" office:value-type="float" office:value="14.793" calcext:value-type="float">
            <text:p>14.7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728" calcext:value-type="float">
            <text:p>27.728</text:p>
          </table:table-cell>
          <table:table-cell office:value-type="float" office:value="41.199" calcext:value-type="float">
            <text:p>41.1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0"/>
          <table:table-cell table:number-columns-repeated="2"/>
          <table:table-cell office:value-type="float" office:value="3" calcext:value-type="float">
            <text:p>3</text:p>
          </table:table-cell>
          <table:table-cell table:formula="of:=[.C4]-[.B4]" office:value-type="float" office:value="13.471" calcext:value-type="float">
            <text:p>13.4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.281" calcext:value-type="float">
            <text:p>42.281</text:p>
          </table:table-cell>
          <table:table-cell office:value-type="float" office:value="56.209" calcext:value-type="float">
            <text:p>56.20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10"/>
          <table:table-cell table:number-columns-repeated="2"/>
          <table:table-cell office:value-type="float" office:value="4" calcext:value-type="float">
            <text:p>4</text:p>
          </table:table-cell>
          <table:table-cell table:formula="of:=[.C5]-[.B5]" office:value-type="float" office:value="13.928" calcext:value-type="float">
            <text:p>13.9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.716" calcext:value-type="float">
            <text:p>44.716</text:p>
          </table:table-cell>
          <table:table-cell office:value-type="float" office:value="55.224" calcext:value-type="float">
            <text:p>55.2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10"/>
          <table:table-cell table:number-columns-repeated="2"/>
          <table:table-cell office:value-type="float" office:value="5" calcext:value-type="float">
            <text:p>5</text:p>
          </table:table-cell>
          <table:table-cell table:formula="of:=[.C6]-[.B6]" office:value-type="float" office:value="10.508" calcext:value-type="float">
            <text:p>10.50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.16" calcext:value-type="float">
            <text:p>56.16</text:p>
          </table:table-cell>
          <table:table-cell office:value-type="float" office:value="61.758" calcext:value-type="float">
            <text:p>61.75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10"/>
          <table:table-cell table:number-columns-repeated="2"/>
          <table:table-cell office:value-type="float" office:value="6" calcext:value-type="float">
            <text:p>6</text:p>
          </table:table-cell>
          <table:table-cell table:formula="of:=[.C7]-[.B7]" office:value-type="float" office:value="5.59800000000001" calcext:value-type="float">
            <text:p>5.5980000000000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.48" calcext:value-type="float">
            <text:p>57.48</text:p>
          </table:table-cell>
          <table:table-cell office:value-type="float" office:value="67.353" calcext:value-type="float">
            <text:p>67.35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10"/>
          <table:table-cell table:number-columns-repeated="2"/>
          <table:table-cell office:value-type="float" office:value="7" calcext:value-type="float">
            <text:p>7</text:p>
          </table:table-cell>
          <table:table-cell table:formula="of:=[.C8]-[.B8]" office:value-type="float" office:value="9.873" calcext:value-type="float">
            <text:p>9.87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.31" calcext:value-type="float">
            <text:p>67.31</text:p>
          </table:table-cell>
          <table:table-cell office:value-type="float" office:value="69.893" calcext:value-type="float">
            <text:p>69.8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10"/>
          <table:table-cell table:number-columns-repeated="2"/>
          <table:table-cell office:value-type="float" office:value="8" calcext:value-type="float">
            <text:p>8</text:p>
          </table:table-cell>
          <table:table-cell table:formula="of:=[.C9]-[.B9]" office:value-type="float" office:value="2.583" calcext:value-type="float">
            <text:p>2.58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.54" calcext:value-type="float">
            <text:p>71.54</text:p>
          </table:table-cell>
          <table:table-cell office:value-type="float" office:value="74.801" calcext:value-type="float">
            <text:p>74.8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10"/>
          <table:table-cell table:number-columns-repeated="2"/>
          <table:table-cell office:value-type="float" office:value="9" calcext:value-type="float">
            <text:p>9</text:p>
          </table:table-cell>
          <table:table-cell table:formula="of:=[.C10]-[.B10]" office:value-type="float" office:value="3.261" calcext:value-type="float">
            <text:p>3.26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.6" calcext:value-type="float">
            <text:p>78.6</text:p>
          </table:table-cell>
          <table:table-cell office:value-type="float" office:value="86.359" calcext:value-type="float">
            <text:p>86.359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1"/>
          <table:table-cell table:number-columns-repeated="2"/>
          <table:table-cell office:value-type="float" office:value="10" calcext:value-type="float">
            <text:p>10</text:p>
          </table:table-cell>
          <table:table-cell table:formula="of:=[.C11]-[.B11]" office:value-type="float" office:value="7.759" calcext:value-type="float">
            <text:p>7.75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.71" calcext:value-type="float">
            <text:p>89.71</text:p>
          </table:table-cell>
          <table:table-cell office:value-type="float" office:value="116.935" calcext:value-type="float">
            <text:p>116.9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10"/>
          <table:table-cell table:number-columns-repeated="2"/>
          <table:table-cell office:value-type="float" office:value="11" calcext:value-type="float">
            <text:p>11</text:p>
          </table:table-cell>
          <table:table-cell table:formula="of:=[.C12]-[.B12]" office:value-type="float" office:value="27.225" calcext:value-type="float">
            <text:p>27.2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141.481" calcext:value-type="float">
            <text:p>141.48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10"/>
          <table:table-cell table:number-columns-repeated="2"/>
          <table:table-cell office:value-type="float" office:value="12" calcext:value-type="float">
            <text:p>12</text:p>
          </table:table-cell>
          <table:table-cell table:formula="of:=[.C13]-[.B13]" office:value-type="float" office:value="40.481" calcext:value-type="float">
            <text:p>40.48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.85" calcext:value-type="float">
            <text:p>101.85</text:p>
          </table:table-cell>
          <table:table-cell office:value-type="float" office:value="185.235" calcext:value-type="float">
            <text:p>185.23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2"/>
          <table:table-cell office:value-type="float" office:value="13" calcext:value-type="float">
            <text:p>13</text:p>
          </table:table-cell>
          <table:table-cell table:formula="of:=[.C14]-[.B14]" office:value-type="float" office:value="83.385" calcext:value-type="float">
            <text:p>83.38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.7" calcext:value-type="float">
            <text:p>125.7</text:p>
          </table:table-cell>
          <table:table-cell office:value-type="float" office:value="189.038" calcext:value-type="float">
            <text:p>189.0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2"/>
          <table:table-cell office:value-type="float" office:value="14" calcext:value-type="float">
            <text:p>14</text:p>
          </table:table-cell>
          <table:table-cell table:formula="of:=[.C15]-[.B15]" office:value-type="float" office:value="63.338" calcext:value-type="float">
            <text:p>63.33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2.03" calcext:value-type="float">
            <text:p>132.03</text:p>
          </table:table-cell>
          <table:table-cell office:value-type="float" office:value="144.589" calcext:value-type="float">
            <text:p>144.58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10"/>
          <table:table-cell table:number-columns-repeated="2"/>
          <table:table-cell office:value-type="float" office:value="15" calcext:value-type="float">
            <text:p>15</text:p>
          </table:table-cell>
          <table:table-cell table:formula="of:=[.C16]-[.B16]" office:value-type="float" office:value="12.559" calcext:value-type="float">
            <text:p>12.55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.435" calcext:value-type="float">
            <text:p>144.435</text:p>
          </table:table-cell>
          <table:table-cell office:value-type="float" office:value="233.249" calcext:value-type="float">
            <text:p>233.24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9"/>
          <table:table-cell table:number-columns-repeated="2"/>
          <table:table-cell office:value-type="float" office:value="16" calcext:value-type="float">
            <text:p>16</text:p>
          </table:table-cell>
          <table:table-cell table:formula="of:=[.C17]-[.B17]" office:value-type="float" office:value="88.814" calcext:value-type="float">
            <text:p>88.81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.082" calcext:value-type="float">
            <text:p>150.082</text:p>
          </table:table-cell>
          <table:table-cell office:value-type="float" office:value="163.972" calcext:value-type="float">
            <text:p>163.97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10"/>
          <table:table-cell table:number-columns-repeated="2"/>
          <table:table-cell office:value-type="float" office:value="17" calcext:value-type="float">
            <text:p>17</text:p>
          </table:table-cell>
          <table:table-cell table:formula="of:=[.C18]-[.B18]" office:value-type="float" office:value="13.89" calcext:value-type="float">
            <text:p>13.8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8.609" calcext:value-type="float">
            <text:p>158.609</text:p>
          </table:table-cell>
          <table:table-cell office:value-type="float" office:value="207.087" calcext:value-type="float">
            <text:p>207.08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10"/>
          <table:table-cell table:number-columns-repeated="2"/>
          <table:table-cell office:value-type="float" office:value="18" calcext:value-type="float">
            <text:p>18</text:p>
          </table:table-cell>
          <table:table-cell table:formula="of:=[.C19]-[.B19]" office:value-type="float" office:value="48.478" calcext:value-type="float">
            <text:p>48.47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0.835" calcext:value-type="float">
            <text:p>170.835</text:p>
          </table:table-cell>
          <table:table-cell office:value-type="float" office:value="218.233" calcext:value-type="float">
            <text:p>218.23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7"/>
          <table:table-cell table:number-columns-repeated="2"/>
          <table:table-cell office:value-type="float" office:value="19" calcext:value-type="float">
            <text:p>19</text:p>
          </table:table-cell>
          <table:table-cell table:formula="of:=[.C20]-[.B20]" office:value-type="float" office:value="47.398" calcext:value-type="float">
            <text:p>47.39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.126" calcext:value-type="float">
            <text:p>180.126</text:p>
          </table:table-cell>
          <table:table-cell office:value-type="float" office:value="244.778" calcext:value-type="float">
            <text:p>244.77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7"/>
          <table:table-cell table:number-columns-repeated="2"/>
          <table:table-cell office:value-type="float" office:value="20" calcext:value-type="float">
            <text:p>20</text:p>
          </table:table-cell>
          <table:table-cell table:formula="of:=[.C21]-[.B21]" office:value-type="float" office:value="64.652" calcext:value-type="float">
            <text:p>64.65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4.769" calcext:value-type="float">
            <text:p>204.769</text:p>
          </table:table-cell>
          <table:table-cell office:value-type="float" office:value="269.335" calcext:value-type="float">
            <text:p>269.33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7"/>
          <table:table-cell table:number-columns-repeated="2"/>
          <table:table-cell office:value-type="float" office:value="21" calcext:value-type="float">
            <text:p>21</text:p>
          </table:table-cell>
          <table:table-cell table:formula="of:=[.C22]-[.B22]" office:value-type="float" office:value="64.566" calcext:value-type="float">
            <text:p>64.56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1.39" calcext:value-type="float">
            <text:p>241.39</text:p>
          </table:table-cell>
          <table:table-cell office:value-type="float" office:value="280.831" calcext:value-type="float">
            <text:p>280.83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3"/>
          <table:table-cell table:number-columns-repeated="2"/>
          <table:table-cell office:value-type="float" office:value="22" calcext:value-type="float">
            <text:p>22</text:p>
          </table:table-cell>
          <table:table-cell table:formula="of:=[.C23]-[.B23]" office:value-type="float" office:value="39.441" calcext:value-type="float">
            <text:p>39.44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8.508" calcext:value-type="float">
            <text:p>248.508</text:p>
          </table:table-cell>
          <table:table-cell office:value-type="float" office:value="290.294" calcext:value-type="float">
            <text:p>290.29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3"/>
          <table:table-cell table:number-columns-repeated="2"/>
          <table:table-cell office:value-type="float" office:value="23" calcext:value-type="float">
            <text:p>23</text:p>
          </table:table-cell>
          <table:table-cell table:formula="of:=[.C24]-[.B24]" office:value-type="float" office:value="41.786" calcext:value-type="float">
            <text:p>41.78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3.01" calcext:value-type="float">
            <text:p>263.01</text:p>
          </table:table-cell>
          <table:table-cell office:value-type="float" office:value="285.421" calcext:value-type="float">
            <text:p>285.42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3"/>
          <table:table-cell table:number-columns-repeated="2"/>
          <table:table-cell office:value-type="float" office:value="24" calcext:value-type="float">
            <text:p>24</text:p>
          </table:table-cell>
          <table:table-cell table:formula="of:=[.C25]-[.B25]" office:value-type="float" office:value="22.411" calcext:value-type="float">
            <text:p>22.41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7.526" calcext:value-type="float">
            <text:p>267.526</text:p>
          </table:table-cell>
          <table:table-cell office:value-type="float" office:value="297.479" calcext:value-type="float">
            <text:p>297.47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3"/>
          <table:table-cell table:number-columns-repeated="2"/>
          <table:table-cell office:value-type="float" office:value="25" calcext:value-type="float">
            <text:p>25</text:p>
          </table:table-cell>
          <table:table-cell table:formula="of:=[.C26]-[.B26]" office:value-type="float" office:value="29.953" calcext:value-type="float">
            <text:p>29.95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7.974" calcext:value-type="float">
            <text:p>267.974</text:p>
          </table:table-cell>
          <table:table-cell office:value-type="float" office:value="293.914" calcext:value-type="float">
            <text:p>293.9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2"/>
          <table:table-cell office:value-type="float" office:value="26" calcext:value-type="float">
            <text:p>26</text:p>
          </table:table-cell>
          <table:table-cell table:formula="of:=[.C27]-[.B27]" office:value-type="float" office:value="25.94" calcext:value-type="float">
            <text:p>25.9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2.909" calcext:value-type="float">
            <text:p>272.909</text:p>
          </table:table-cell>
          <table:table-cell office:value-type="float" office:value="309.072" calcext:value-type="float">
            <text:p>309.07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9"/>
          <table:table-cell table:number-columns-repeated="2"/>
          <table:table-cell office:value-type="float" office:value="27" calcext:value-type="float">
            <text:p>27</text:p>
          </table:table-cell>
          <table:table-cell table:formula="of:=[.C28]-[.B28]" office:value-type="float" office:value="36.163" calcext:value-type="float">
            <text:p>36.16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4.575" calcext:value-type="float">
            <text:p>294.575</text:p>
          </table:table-cell>
          <table:table-cell office:value-type="float" office:value="321.466" calcext:value-type="float">
            <text:p>321.46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9"/>
          <table:table-cell table:number-columns-repeated="2"/>
          <table:table-cell office:value-type="float" office:value="28" calcext:value-type="float">
            <text:p>28</text:p>
          </table:table-cell>
          <table:table-cell table:formula="of:=[.C29]-[.B29]" office:value-type="float" office:value="26.891" calcext:value-type="float">
            <text:p>26.8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4.913" calcext:value-type="float">
            <text:p>294.913</text:p>
          </table:table-cell>
          <table:table-cell office:value-type="float" office:value="296.805" calcext:value-type="float">
            <text:p>296.80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9"/>
          <table:table-cell table:number-columns-repeated="2"/>
          <table:table-cell office:value-type="float" office:value="29" calcext:value-type="float">
            <text:p>29</text:p>
          </table:table-cell>
          <table:table-cell table:formula="of:=[.C30]-[.B30]" office:value-type="float" office:value="1.892" calcext:value-type="float">
            <text:p>1.89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3.739" calcext:value-type="float">
            <text:p>313.739</text:p>
          </table:table-cell>
          <table:table-cell office:value-type="float" office:value="354.452" calcext:value-type="float">
            <text:p>354.45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8"/>
          <table:table-cell table:number-columns-repeated="2"/>
          <table:table-cell office:value-type="float" office:value="30" calcext:value-type="float">
            <text:p>30</text:p>
          </table:table-cell>
          <table:table-cell table:formula="of:=[.C31]-[.B31]" office:value-type="float" office:value="40.713" calcext:value-type="float">
            <text:p>40.71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2.489" calcext:value-type="float">
            <text:p>332.489</text:p>
          </table:table-cell>
          <table:table-cell office:value-type="float" office:value="364.842" calcext:value-type="float">
            <text:p>364.84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9"/>
          <table:table-cell table:number-columns-repeated="2"/>
          <table:table-cell office:value-type="float" office:value="31" calcext:value-type="float">
            <text:p>31</text:p>
          </table:table-cell>
          <table:table-cell table:formula="of:=[.C32]-[.B32]" office:value-type="float" office:value="32.353" calcext:value-type="float">
            <text:p>32.35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3.568" calcext:value-type="float">
            <text:p>363.568</text:p>
          </table:table-cell>
          <table:table-cell office:value-type="float" office:value="392.595" calcext:value-type="float">
            <text:p>392.59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7"/>
          <table:table-cell table:number-columns-repeated="2"/>
          <table:table-cell office:value-type="float" office:value="32" calcext:value-type="float">
            <text:p>32</text:p>
          </table:table-cell>
          <table:table-cell table:formula="of:=[.C33]-[.B33]" office:value-type="float" office:value="29.027" calcext:value-type="float">
            <text:p>29.02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8.237" calcext:value-type="float">
            <text:p>368.237</text:p>
          </table:table-cell>
          <table:table-cell office:value-type="float" office:value="397.396" calcext:value-type="float">
            <text:p>397.39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7"/>
          <table:table-cell table:number-columns-repeated="2"/>
          <table:table-cell office:value-type="float" office:value="33" calcext:value-type="float">
            <text:p>33</text:p>
          </table:table-cell>
          <table:table-cell table:formula="of:=[.C34]-[.B34]" office:value-type="float" office:value="29.159" calcext:value-type="float">
            <text:p>29.15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4.34" calcext:value-type="float">
            <text:p>384.34</text:p>
          </table:table-cell>
          <table:table-cell office:value-type="float" office:value="401.747" calcext:value-type="float">
            <text:p>401.747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11"/>
          <table:table-cell table:number-columns-repeated="2"/>
          <table:table-cell office:value-type="float" office:value="34" calcext:value-type="float">
            <text:p>34</text:p>
          </table:table-cell>
          <table:table-cell table:formula="of:=[.C35]-[.B35]" office:value-type="float" office:value="17.407" calcext:value-type="float">
            <text:p>17.40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7.504" calcext:value-type="float">
            <text:p>387.504</text:p>
          </table:table-cell>
          <table:table-cell office:value-type="float" office:value="410.613" calcext:value-type="float">
            <text:p>410.6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9"/>
          <table:table-cell table:number-columns-repeated="2"/>
          <table:table-cell office:value-type="float" office:value="35" calcext:value-type="float">
            <text:p>35</text:p>
          </table:table-cell>
          <table:table-cell table:formula="of:=[.C36]-[.B36]" office:value-type="float" office:value="23.109" calcext:value-type="float">
            <text:p>23.10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4.784" calcext:value-type="float">
            <text:p>424.784</text:p>
          </table:table-cell>
          <table:table-cell office:value-type="float" office:value="433.929" calcext:value-type="float">
            <text:p>433.9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9"/>
          <table:table-cell table:number-columns-repeated="2"/>
          <table:table-cell office:value-type="float" office:value="36" calcext:value-type="float">
            <text:p>36</text:p>
          </table:table-cell>
          <table:table-cell table:formula="of:=[.C37]-[.B37]" office:value-type="float" office:value="9.14499999999998" calcext:value-type="float">
            <text:p>9.1449999999999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2.445" calcext:value-type="float">
            <text:p>432.445</text:p>
          </table:table-cell>
          <table:table-cell office:value-type="float" office:value="427.776" calcext:value-type="float">
            <text:p>427.77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9"/>
          <table:table-cell table:number-columns-repeated="2"/>
          <table:table-cell office:value-type="float" office:value="37" calcext:value-type="float">
            <text:p>37</text:p>
          </table:table-cell>
          <table:table-cell table:formula="of:=[.C38]-[.B38]" office:value-type="float" office:value="-4.66899999999998" calcext:value-type="float">
            <text:p>-4.6689999999999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9.953" calcext:value-type="float">
            <text:p>469.953</text:p>
          </table:table-cell>
          <table:table-cell office:value-type="float" office:value="471.99" calcext:value-type="float">
            <text:p>471.9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9"/>
          <table:table-cell table:number-columns-repeated="2"/>
          <table:table-cell office:value-type="float" office:value="38" calcext:value-type="float">
            <text:p>38</text:p>
          </table:table-cell>
          <table:table-cell table:formula="of:=[.C39]-[.B39]" office:value-type="float" office:value="2.03700000000003" calcext:value-type="float">
            <text:p>2.0370000000000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2.216" calcext:value-type="float">
            <text:p>472.216</text:p>
          </table:table-cell>
          <table:table-cell office:value-type="float" office:value="474.858" calcext:value-type="float">
            <text:p>474.85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9"/>
          <table:table-cell table:number-columns-repeated="2"/>
          <table:table-cell office:value-type="float" office:value="39" calcext:value-type="float">
            <text:p>39</text:p>
          </table:table-cell>
          <table:table-cell table:formula="of:=[.C40]-[.B40]" office:value-type="float" office:value="2.642" calcext:value-type="float">
            <text:p>2.64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5.166" calcext:value-type="float">
            <text:p>495.166</text:p>
          </table:table-cell>
          <table:table-cell office:value-type="float" office:value="482.798" calcext:value-type="float">
            <text:p>482.79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3"/>
          <table:table-cell table:number-columns-repeated="2"/>
          <table:table-cell office:value-type="float" office:value="40" calcext:value-type="float">
            <text:p>40</text:p>
          </table:table-cell>
          <table:table-cell table:formula="of:=[.C41]-[.B41]" office:value-type="float" office:value="-12.368" calcext:value-type="float">
            <text:p>-12.36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3.755" calcext:value-type="float">
            <text:p>503.755</text:p>
          </table:table-cell>
          <table:table-cell office:value-type="float" office:value="529.311" calcext:value-type="float">
            <text:p>529.3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2"/>
          <table:table-cell office:value-type="float" office:value="41" calcext:value-type="float">
            <text:p>41</text:p>
          </table:table-cell>
          <table:table-cell table:formula="of:=[.C42]-[.B42]" office:value-type="float" office:value="25.556" calcext:value-type="float">
            <text:p>25.55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8.148" calcext:value-type="float">
            <text:p>518.148</text:p>
          </table:table-cell>
          <table:table-cell office:value-type="float" office:value="527.087" calcext:value-type="float">
            <text:p>527.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3"/>
          <table:table-cell table:number-columns-repeated="2"/>
          <table:table-cell office:value-type="float" office:value="42" calcext:value-type="float">
            <text:p>42</text:p>
          </table:table-cell>
          <table:table-cell table:formula="of:=[.C43]-[.B43]" office:value-type="float" office:value="8.93899999999997" calcext:value-type="float">
            <text:p>8.9389999999999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0.462" calcext:value-type="float">
            <text:p>520.462</text:p>
          </table:table-cell>
          <table:table-cell office:value-type="float" office:value="529.013" calcext:value-type="float">
            <text:p>529.0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8"/>
          <table:table-cell table:number-columns-repeated="2"/>
          <table:table-cell office:value-type="float" office:value="43" calcext:value-type="float">
            <text:p>43</text:p>
          </table:table-cell>
          <table:table-cell table:formula="of:=[.C44]-[.B44]" office:value-type="float" office:value="8.55100000000005" calcext:value-type="float">
            <text:p>8.5510000000000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0.496" calcext:value-type="float">
            <text:p>520.496</text:p>
          </table:table-cell>
          <table:table-cell office:value-type="float" office:value="532.194" calcext:value-type="float">
            <text:p>532.19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9"/>
          <table:table-cell table:number-columns-repeated="2"/>
          <table:table-cell office:value-type="float" office:value="44" calcext:value-type="float">
            <text:p>44</text:p>
          </table:table-cell>
          <table:table-cell table:formula="of:=[.C45]-[.B45]" office:value-type="float" office:value="11.698" calcext:value-type="float">
            <text:p>11.69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2.77" calcext:value-type="float">
            <text:p>522.77</text:p>
          </table:table-cell>
          <table:table-cell office:value-type="float" office:value="609.452" calcext:value-type="float">
            <text:p>609.4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7"/>
          <table:table-cell table:number-columns-repeated="2"/>
          <table:table-cell office:value-type="float" office:value="45" calcext:value-type="float">
            <text:p>45</text:p>
          </table:table-cell>
          <table:table-cell table:formula="of:=[.C46]-[.B46]" office:value-type="float" office:value="86.682" calcext:value-type="float">
            <text:p>86.68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3.75" calcext:value-type="float">
            <text:p>563.75</text:p>
          </table:table-cell>
          <table:table-cell office:value-type="float" office:value="734.915" calcext:value-type="float">
            <text:p>734.91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5"/>
          <table:table-cell table:number-columns-repeated="2"/>
          <table:table-cell office:value-type="float" office:value="46" calcext:value-type="float">
            <text:p>46</text:p>
          </table:table-cell>
          <table:table-cell table:formula="of:=[.C47]-[.B47]" office:value-type="float" office:value="171.165" calcext:value-type="float">
            <text:p>171.16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4.14" calcext:value-type="float">
            <text:p>564.14</text:p>
          </table:table-cell>
          <table:table-cell office:value-type="float" office:value="751.533" calcext:value-type="float">
            <text:p>751.53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5"/>
          <table:table-cell table:number-columns-repeated="2"/>
          <table:table-cell office:value-type="float" office:value="47" calcext:value-type="float">
            <text:p>47</text:p>
          </table:table-cell>
          <table:table-cell table:formula="of:=[.C48]-[.B48]" office:value-type="float" office:value="187.393" calcext:value-type="float">
            <text:p>187.39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7.79" calcext:value-type="float">
            <text:p>567.79</text:p>
          </table:table-cell>
          <table:table-cell office:value-type="float" office:value="744.91" calcext:value-type="float">
            <text:p>744.9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number-columns-repeated="2"/>
          <table:table-cell office:value-type="float" office:value="48" calcext:value-type="float">
            <text:p>48</text:p>
          </table:table-cell>
          <table:table-cell table:formula="of:=[.C49]-[.B49]" office:value-type="float" office:value="177.12" calcext:value-type="float">
            <text:p>177.1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8.59" calcext:value-type="float">
            <text:p>568.59</text:p>
          </table:table-cell>
          <table:table-cell office:value-type="float" office:value="811.553" calcext:value-type="float">
            <text:p>811.55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C50]-[.B50]" office:value-type="float" office:value="242.963" calcext:value-type="float">
            <text:p>242.96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4.56" calcext:value-type="float">
            <text:p>624.56</text:p>
          </table:table-cell>
          <table:table-cell office:value-type="float" office:value="857.782" calcext:value-type="float">
            <text:p>857.78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9" calcext:value-type="float">
            <text:p>109</text:p>
          </table:table-cell>
          <table:table-cell table:style-name="ce1" table:number-columns-repeated="10"/>
          <table:table-cell table:number-columns-repeated="2"/>
          <table:table-cell office:value-type="float" office:value="50" calcext:value-type="float">
            <text:p>50</text:p>
          </table:table-cell>
          <table:table-cell table:formula="of:=[.C51]-[.B51]" office:value-type="float" office:value="233.222" calcext:value-type="float">
            <text:p>233.22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1.82" calcext:value-type="float">
            <text:p>631.82</text:p>
          </table:table-cell>
          <table:table-cell office:value-type="float" office:value="655.292" calcext:value-type="float">
            <text:p>655.29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10"/>
          <table:table-cell table:number-columns-repeated="2"/>
          <table:table-cell office:value-type="float" office:value="51" calcext:value-type="float">
            <text:p>51</text:p>
          </table:table-cell>
          <table:table-cell table:formula="of:=[.C52]-[.B52]" office:value-type="float" office:value="23.472" calcext:value-type="float">
            <text:p>23.47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5.169" calcext:value-type="float">
            <text:p>645.169</text:p>
          </table:table-cell>
          <table:table-cell office:value-type="float" office:value="806.093" calcext:value-type="float">
            <text:p>806.09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48" calcext:value-type="float">
            <text:p>148</text:p>
          </table:table-cell>
          <table:table-cell table:style-name="ce1" table:number-columns-repeated="7"/>
          <table:table-cell table:number-columns-repeated="2"/>
          <table:table-cell office:value-type="float" office:value="52" calcext:value-type="float">
            <text:p>52</text:p>
          </table:table-cell>
          <table:table-cell table:formula="of:=[.C53]-[.B53]" office:value-type="float" office:value="160.924" calcext:value-type="float">
            <text:p>160.92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6.647" calcext:value-type="float">
            <text:p>646.647</text:p>
          </table:table-cell>
          <table:table-cell office:value-type="float" office:value="652.957" calcext:value-type="float">
            <text:p>652.95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5"/>
          <table:table-cell table:number-columns-repeated="2"/>
          <table:table-cell office:value-type="float" office:value="53" calcext:value-type="float">
            <text:p>53</text:p>
          </table:table-cell>
          <table:table-cell table:formula="of:=[.C54]-[.B54]" office:value-type="float" office:value="6.30999999999995" calcext:value-type="float">
            <text:p>6.3099999999999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8.928" calcext:value-type="float">
            <text:p>658.928</text:p>
          </table:table-cell>
          <table:table-cell office:value-type="float" office:value="665.952" calcext:value-type="float">
            <text:p>665.95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5"/>
          <table:table-cell table:number-columns-repeated="2"/>
          <table:table-cell office:value-type="float" office:value="54" calcext:value-type="float">
            <text:p>54</text:p>
          </table:table-cell>
          <table:table-cell table:formula="of:=[.C55]-[.B55]" office:value-type="float" office:value="7.024" calcext:value-type="float">
            <text:p>7.02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9.006" calcext:value-type="float">
            <text:p>659.006</text:p>
          </table:table-cell>
          <table:table-cell office:value-type="float" office:value="670.021" calcext:value-type="float">
            <text:p>670.02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10"/>
          <table:table-cell table:number-columns-repeated="2"/>
          <table:table-cell office:value-type="float" office:value="55" calcext:value-type="float">
            <text:p>55</text:p>
          </table:table-cell>
          <table:table-cell table:formula="of:=[.C56]-[.B56]" office:value-type="float" office:value="11.015" calcext:value-type="float">
            <text:p>11.01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93.194" calcext:value-type="float">
            <text:p>693.194</text:p>
          </table:table-cell>
          <table:table-cell office:value-type="float" office:value="696.509" calcext:value-type="float">
            <text:p>696.50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10"/>
          <table:table-cell table:number-columns-repeated="2"/>
          <table:table-cell office:value-type="float" office:value="56" calcext:value-type="float">
            <text:p>56</text:p>
          </table:table-cell>
          <table:table-cell table:formula="of:=[.C57]-[.B57]" office:value-type="float" office:value="3.31500000000005" calcext:value-type="float">
            <text:p>3.3150000000000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4.908" calcext:value-type="float">
            <text:p>694.908</text:p>
          </table:table-cell>
          <table:table-cell office:value-type="float" office:value="694.569" calcext:value-type="float">
            <text:p>694.5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10"/>
          <table:table-cell table:number-columns-repeated="2"/>
          <table:table-cell office:value-type="float" office:value="57" calcext:value-type="float">
            <text:p>57</text:p>
          </table:table-cell>
          <table:table-cell table:formula="of:=[.C58]-[.B58]" office:value-type="float" office:value="-0.339000000000056" calcext:value-type="float">
            <text:p>-0.33900000000005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9.016" calcext:value-type="float">
            <text:p>759.016</text:p>
          </table:table-cell>
          <table:table-cell office:value-type="float" office:value="760.294" calcext:value-type="float">
            <text:p>760.29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9"/>
          <table:table-cell table:number-columns-repeated="2"/>
          <table:table-cell office:value-type="float" office:value="58" calcext:value-type="float">
            <text:p>58</text:p>
          </table:table-cell>
          <table:table-cell table:formula="of:=[.C59]-[.B59]" office:value-type="float" office:value="1.27800000000002" calcext:value-type="float">
            <text:p>1.2780000000000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9.342" calcext:value-type="float">
            <text:p>759.342</text:p>
          </table:table-cell>
          <table:table-cell office:value-type="float" office:value="762.215" calcext:value-type="float">
            <text:p>762.21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9"/>
          <table:table-cell table:number-columns-repeated="2"/>
          <table:table-cell office:value-type="float" office:value="59" calcext:value-type="float">
            <text:p>59</text:p>
          </table:table-cell>
          <table:table-cell table:formula="of:=[.C60]-[.B60]" office:value-type="float" office:value="2.87300000000005" calcext:value-type="float">
            <text:p>2.8730000000000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66.172" calcext:value-type="float">
            <text:p>766.172</text:p>
          </table:table-cell>
          <table:table-cell office:value-type="float" office:value="769.203" calcext:value-type="float">
            <text:p>769.203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11"/>
          <table:table-cell table:number-columns-repeated="2"/>
          <table:table-cell office:value-type="float" office:value="60" calcext:value-type="float">
            <text:p>60</text:p>
          </table:table-cell>
          <table:table-cell table:formula="of:=[.C61]-[.B61]" office:value-type="float" office:value="3.03099999999995" calcext:value-type="float">
            <text:p>3.0309999999999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8.047" calcext:value-type="float">
            <text:p>768.047</text:p>
          </table:table-cell>
          <table:table-cell office:value-type="float" office:value="772.943" calcext:value-type="float">
            <text:p>772.943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11"/>
          <table:table-cell table:number-columns-repeated="2"/>
          <table:table-cell office:value-type="float" office:value="61" calcext:value-type="float">
            <text:p>61</text:p>
          </table:table-cell>
          <table:table-cell table:formula="of:=[.C62]-[.B62]" office:value-type="float" office:value="4.89599999999996" calcext:value-type="float">
            <text:p>4.8959999999999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8.925" calcext:value-type="float">
            <text:p>788.925</text:p>
          </table:table-cell>
          <table:table-cell office:value-type="float" office:value="781.511" calcext:value-type="float">
            <text:p>781.51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9"/>
          <table:table-cell table:number-columns-repeated="2"/>
          <table:table-cell office:value-type="float" office:value="62" calcext:value-type="float">
            <text:p>62</text:p>
          </table:table-cell>
          <table:table-cell table:formula="of:=[.C63]-[.B63]" office:value-type="float" office:value="-7.41399999999999" calcext:value-type="float">
            <text:p>-7.4139999999999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9.095" calcext:value-type="float">
            <text:p>789.095</text:p>
          </table:table-cell>
          <table:table-cell office:value-type="float" office:value="779.744" calcext:value-type="float">
            <text:p>779.74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9"/>
          <table:table-cell table:number-columns-repeated="2"/>
          <table:table-cell office:value-type="float" office:value="63" calcext:value-type="float">
            <text:p>63</text:p>
          </table:table-cell>
          <table:table-cell table:formula="of:=[.C64]-[.B64]" office:value-type="float" office:value="-9.351" calcext:value-type="float">
            <text:p>-9.35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9.86" calcext:value-type="float">
            <text:p>799.86</text:p>
          </table:table-cell>
          <table:table-cell office:value-type="float" office:value="799.252" calcext:value-type="float">
            <text:p>799.25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10"/>
          <table:table-cell table:number-columns-repeated="2"/>
          <table:table-cell office:value-type="float" office:value="64" calcext:value-type="float">
            <text:p>64</text:p>
          </table:table-cell>
          <table:table-cell table:formula="of:=[.C65]-[.B65]" office:value-type="float" office:value="-0.608000000000061" calcext:value-type="float">
            <text:p>-0.60800000000006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0.597" calcext:value-type="float">
            <text:p>800.597</text:p>
          </table:table-cell>
          <table:table-cell office:value-type="float" office:value="801.322" calcext:value-type="float">
            <text:p>801.32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"/>
          <table:table-cell table:number-columns-repeated="2"/>
          <table:table-cell office:value-type="float" office:value="65" calcext:value-type="float">
            <text:p>65</text:p>
          </table:table-cell>
          <table:table-cell table:formula="of:=[.C66]-[.B66]" office:value-type="float" office:value="0.725000000000023" calcext:value-type="float">
            <text:p>0.72500000000002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37.923" calcext:value-type="float">
            <text:p>837.923</text:p>
          </table:table-cell>
          <table:table-cell office:value-type="float" office:value="846.893" calcext:value-type="float">
            <text:p>846.89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10"/>
          <table:table-cell table:number-columns-repeated="2"/>
          <table:table-cell office:value-type="float" office:value="66" calcext:value-type="float">
            <text:p>66</text:p>
          </table:table-cell>
          <table:table-cell table:formula="of:=[.C67]-[.B67]" office:value-type="float" office:value="8.97000000000003" calcext:value-type="float">
            <text:p>8.9700000000000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9.736" calcext:value-type="float">
            <text:p>839.736</text:p>
          </table:table-cell>
          <table:table-cell office:value-type="float" office:value="848.451" calcext:value-type="float">
            <text:p>848.451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11"/>
          <table:table-cell table:number-columns-repeated="2"/>
          <table:table-cell office:value-type="float" office:value="67" calcext:value-type="float">
            <text:p>67</text:p>
          </table:table-cell>
          <table:table-cell table:formula="of:=[.C68]-[.B68]" office:value-type="float" office:value="8.71500000000003" calcext:value-type="float">
            <text:p>8.7150000000000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6.09" calcext:value-type="float">
            <text:p>856.09</text:p>
          </table:table-cell>
          <table:table-cell office:value-type="float" office:value="857.035" calcext:value-type="float">
            <text:p>857.035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11"/>
          <table:table-cell table:number-columns-repeated="2"/>
          <table:table-cell office:value-type="float" office:value="68" calcext:value-type="float">
            <text:p>68</text:p>
          </table:table-cell>
          <table:table-cell table:formula="of:=[.C69]-[.B69]" office:value-type="float" office:value="0.944999999999936" calcext:value-type="float">
            <text:p>0.94499999999993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6.445" calcext:value-type="float">
            <text:p>856.445</text:p>
          </table:table-cell>
          <table:table-cell office:value-type="float" office:value="856.834" calcext:value-type="float">
            <text:p>856.834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11"/>
          <table:table-cell table:number-columns-repeated="2"/>
          <table:table-cell office:value-type="float" office:value="69" calcext:value-type="float">
            <text:p>69</text:p>
          </table:table-cell>
          <table:table-cell table:formula="of:=[.C70]-[.B70]" office:value-type="float" office:value="0.388999999999896" calcext:value-type="float">
            <text:p>0.38899999999989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67.241" calcext:value-type="float">
            <text:p>867.241</text:p>
          </table:table-cell>
          <table:table-cell office:value-type="float" office:value="860.909" calcext:value-type="float">
            <text:p>860.909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11"/>
          <table:table-cell table:number-columns-repeated="2"/>
          <table:table-cell office:value-type="float" office:value="70" calcext:value-type="float">
            <text:p>70</text:p>
          </table:table-cell>
          <table:table-cell table:formula="of:=[.C71]-[.B71]" office:value-type="float" office:value="-6.33199999999999" calcext:value-type="float">
            <text:p>-6.3319999999999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7.533" calcext:value-type="float">
            <text:p>867.533</text:p>
          </table:table-cell>
          <table:table-cell office:value-type="float" office:value="861.563" calcext:value-type="float">
            <text:p>861.563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1"/>
          <table:table-cell table:number-columns-repeated="2"/>
          <table:table-cell office:value-type="float" office:value="71" calcext:value-type="float">
            <text:p>71</text:p>
          </table:table-cell>
          <table:table-cell table:formula="of:=[.C72]-[.B72]" office:value-type="float" office:value="-5.97000000000003" calcext:value-type="float">
            <text:p>-5.9700000000000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4.85" calcext:value-type="float">
            <text:p>904.85</text:p>
          </table:table-cell>
          <table:table-cell office:value-type="float" office:value="893.792" calcext:value-type="float">
            <text:p>893.79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10"/>
          <table:table-cell table:number-columns-repeated="2"/>
          <table:table-cell office:value-type="float" office:value="72" calcext:value-type="float">
            <text:p>72</text:p>
          </table:table-cell>
          <table:table-cell table:formula="of:=[.C73]-[.B73]" office:value-type="float" office:value="-11.058" calcext:value-type="float">
            <text:p>-11.05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05.131" calcext:value-type="float">
            <text:p>905.131</text:p>
          </table:table-cell>
          <table:table-cell office:value-type="float" office:value="892.887" calcext:value-type="float">
            <text:p>892.88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10"/>
          <table:table-cell table:number-columns-repeated="2"/>
          <table:table-cell office:value-type="float" office:value="73" calcext:value-type="float">
            <text:p>73</text:p>
          </table:table-cell>
          <table:table-cell table:formula="of:=[.C74]-[.B74]" office:value-type="float" office:value="-12.244" calcext:value-type="float">
            <text:p>-12.24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1.981" calcext:value-type="float">
            <text:p>911.981</text:p>
          </table:table-cell>
          <table:table-cell office:value-type="float" office:value="913.728" calcext:value-type="float">
            <text:p>913.72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5"/>
          <table:table-cell table:number-columns-repeated="2"/>
          <table:table-cell office:value-type="float" office:value="74" calcext:value-type="float">
            <text:p>74</text:p>
          </table:table-cell>
          <table:table-cell table:formula="of:=[.C75]-[.B75]" office:value-type="float" office:value="1.74699999999996" calcext:value-type="float">
            <text:p>1.7469999999999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5.312" calcext:value-type="float">
            <text:p>915.312</text:p>
          </table:table-cell>
          <table:table-cell office:value-type="float" office:value="916.305" calcext:value-type="float">
            <text:p>916.30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7"/>
          <table:table-cell table:number-columns-repeated="2"/>
          <table:table-cell office:value-type="float" office:value="75" calcext:value-type="float">
            <text:p>75</text:p>
          </table:table-cell>
          <table:table-cell table:formula="of:=[.C76]-[.B76]" office:value-type="float" office:value="0.992999999999938" calcext:value-type="float">
            <text:p>0.99299999999993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30.428" calcext:value-type="float">
            <text:p>930.428</text:p>
          </table:table-cell>
          <table:table-cell office:value-type="float" office:value="930.12" calcext:value-type="float">
            <text:p>930.1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7"/>
          <table:table-cell table:number-columns-repeated="2"/>
          <table:table-cell office:value-type="float" office:value="76" calcext:value-type="float">
            <text:p>76</text:p>
          </table:table-cell>
          <table:table-cell table:formula="of:=[.C77]-[.B77]" office:value-type="float" office:value="-0.307999999999993" calcext:value-type="float">
            <text:p>-0.30799999999999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0.442" calcext:value-type="float">
            <text:p>930.442</text:p>
          </table:table-cell>
          <table:table-cell office:value-type="float" office:value="930.087" calcext:value-type="float">
            <text:p>930.08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7"/>
          <table:table-cell table:number-columns-repeated="2"/>
          <table:table-cell office:value-type="float" office:value="77" calcext:value-type="float">
            <text:p>77</text:p>
          </table:table-cell>
          <table:table-cell table:formula="of:=[.C78]-[.B78]" office:value-type="float" office:value="-0.355000000000018" calcext:value-type="float">
            <text:p>-0.35500000000001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52.015" calcext:value-type="float">
            <text:p>952.015</text:p>
          </table:table-cell>
          <table:table-cell office:value-type="float" office:value="905.874" calcext:value-type="float">
            <text:p>905.87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7"/>
          <table:table-cell table:number-columns-repeated="2"/>
          <table:table-cell office:value-type="float" office:value="78" calcext:value-type="float">
            <text:p>78</text:p>
          </table:table-cell>
          <table:table-cell table:formula="of:=[.C79]-[.B79]" office:value-type="float" office:value="-46.141" calcext:value-type="float">
            <text:p>-46.14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52.34" calcext:value-type="float">
            <text:p>952.34</text:p>
          </table:table-cell>
          <table:table-cell office:value-type="float" office:value="908.495" calcext:value-type="float">
            <text:p>908.49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9"/>
          <table:table-cell table:number-columns-repeated="2"/>
          <table:table-cell office:value-type="float" office:value="79" calcext:value-type="float">
            <text:p>79</text:p>
          </table:table-cell>
          <table:table-cell table:formula="of:=[.C80]-[.B80]" office:value-type="float" office:value="-43.845" calcext:value-type="float">
            <text:p>-43.84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84.292" calcext:value-type="float">
            <text:p>984.292</text:p>
          </table:table-cell>
          <table:table-cell office:value-type="float" office:value="988.623" calcext:value-type="float">
            <text:p>988.623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11"/>
          <table:table-cell table:number-columns-repeated="2"/>
          <table:table-cell office:value-type="float" office:value="80" calcext:value-type="float">
            <text:p>80</text:p>
          </table:table-cell>
          <table:table-cell table:formula="of:=[.C81]-[.B81]" office:value-type="float" office:value="4.33100000000002" calcext:value-type="float">
            <text:p>4.3310000000000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87.277" calcext:value-type="float">
            <text:p>987.277</text:p>
          </table:table-cell>
          <table:table-cell office:value-type="float" office:value="991.3" calcext:value-type="float">
            <text:p>991.3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11"/>
          <table:table-cell table:number-columns-repeated="2"/>
          <table:table-cell office:value-type="float" office:value="81" calcext:value-type="float">
            <text:p>81</text:p>
          </table:table-cell>
          <table:table-cell table:formula="of:=[.C82]-[.B82]" office:value-type="float" office:value="4.02299999999991" calcext:value-type="float">
            <text:p>4.0229999999999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4.144" calcext:value-type="float">
            <text:p>994.144</text:p>
          </table:table-cell>
          <table:table-cell office:value-type="float" office:value="985.275" calcext:value-type="float">
            <text:p>985.275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11"/>
          <table:table-cell table:number-columns-repeated="2"/>
          <table:table-cell office:value-type="float" office:value="82" calcext:value-type="float">
            <text:p>82</text:p>
          </table:table-cell>
          <table:table-cell table:formula="of:=[.C83]-[.B83]" office:value-type="float" office:value="-8.86900000000003" calcext:value-type="float">
            <text:p>-8.8690000000000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4.658" calcext:value-type="float">
            <text:p>994.658</text:p>
          </table:table-cell>
          <table:table-cell office:value-type="float" office:value="985.933" calcext:value-type="float">
            <text:p>985.933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11"/>
          <table:table-cell table:number-columns-repeated="2"/>
          <table:table-cell office:value-type="float" office:value="83" calcext:value-type="float">
            <text:p>83</text:p>
          </table:table-cell>
          <table:table-cell table:formula="of:=[.C84]-[.B84]" office:value-type="float" office:value="-8.72500000000002" calcext:value-type="float">
            <text:p>-8.7250000000000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.56" calcext:value-type="float">
            <text:p>1000.56</text:p>
          </table:table-cell>
          <table:table-cell office:value-type="float" office:value="997.877" calcext:value-type="float">
            <text:p>997.87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10"/>
          <table:table-cell table:number-columns-repeated="2"/>
          <table:table-cell office:value-type="float" office:value="84" calcext:value-type="float">
            <text:p>84</text:p>
          </table:table-cell>
          <table:table-cell table:formula="of:=[.C85]-[.B85]" office:value-type="float" office:value="-2.68299999999999" calcext:value-type="float">
            <text:p>-2.682999999999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.58" calcext:value-type="float">
            <text:p>1000.58</text:p>
          </table:table-cell>
          <table:table-cell office:value-type="float" office:value="997.879" calcext:value-type="float">
            <text:p>997.87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10"/>
          <table:table-cell table:number-columns-repeated="2"/>
          <table:table-cell office:value-type="float" office:value="85" calcext:value-type="float">
            <text:p>85</text:p>
          </table:table-cell>
          <table:table-cell table:formula="of:=[.C86]-[.B86]" office:value-type="float" office:value="-2.70100000000002" calcext:value-type="float">
            <text:p>-2.7010000000000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6.038" calcext:value-type="float">
            <text:p>1016.038</text:p>
          </table:table-cell>
          <table:table-cell office:value-type="float" office:value="1006.947" calcext:value-type="float">
            <text:p>1006.94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number-columns-repeated="10"/>
          <table:table-cell table:number-columns-repeated="2"/>
          <table:table-cell office:value-type="float" office:value="86" calcext:value-type="float">
            <text:p>86</text:p>
          </table:table-cell>
          <table:table-cell table:formula="of:=[.C87]-[.B87]" office:value-type="float" office:value="-9.09100000000001" calcext:value-type="float">
            <text:p>-9.0910000000000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6.086" calcext:value-type="float">
            <text:p>1016.086</text:p>
          </table:table-cell>
          <table:table-cell office:value-type="float" office:value="1006.948" calcext:value-type="float">
            <text:p>1006.94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number-columns-repeated="10"/>
          <table:table-cell table:number-columns-repeated="2"/>
          <table:table-cell office:value-type="float" office:value="87" calcext:value-type="float">
            <text:p>87</text:p>
          </table:table-cell>
          <table:table-cell table:formula="of:=[.C88]-[.B88]" office:value-type="float" office:value="-9.13800000000003" calcext:value-type="float">
            <text:p>-9.1380000000000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8.874" calcext:value-type="float">
            <text:p>1028.874</text:p>
          </table:table-cell>
          <table:table-cell office:value-type="float" office:value="1043.598" calcext:value-type="float">
            <text:p>1043.598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11"/>
          <table:table-cell table:number-columns-repeated="2"/>
          <table:table-cell office:value-type="float" office:value="88" calcext:value-type="float">
            <text:p>88</text:p>
          </table:table-cell>
          <table:table-cell table:formula="of:=[.C89]-[.B89]" office:value-type="float" office:value="14.7239999999999" calcext:value-type="float">
            <text:p>14.723999999999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1.868" calcext:value-type="float">
            <text:p>1031.868</text:p>
          </table:table-cell>
          <table:table-cell office:value-type="float" office:value="1046.776" calcext:value-type="float">
            <text:p>1046.776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number-columns-repeated="11"/>
          <table:table-cell table:number-columns-repeated="2"/>
          <table:table-cell office:value-type="float" office:value="89" calcext:value-type="float">
            <text:p>89</text:p>
          </table:table-cell>
          <table:table-cell table:formula="of:=[.C90]-[.B90]" office:value-type="float" office:value="14.9080000000001" calcext:value-type="float">
            <text:p>14.908000000000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083.04</text:p>
          </table:table-cell>
          <table:table-cell office:value-type="float" office:value="1082.351" calcext:value-type="float">
            <text:p>1082.351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11"/>
          <table:table-cell table:number-columns-repeated="2"/>
          <table:table-cell office:value-type="float" office:value="90" calcext:value-type="float">
            <text:p>90</text:p>
          </table:table-cell>
          <table:table-cell table:formula="of:=[.C91]-[.B91]" office:value-type="float" office:value="-0.688999999999851" calcext:value-type="float">
            <text:p>-0.68899999999985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83.268" calcext:value-type="float">
            <text:p>1083.268</text:p>
          </table:table-cell>
          <table:table-cell office:value-type="float" office:value="1083.089" calcext:value-type="float">
            <text:p>1083.089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number-columns-repeated="11"/>
          <table:table-cell table:number-columns-repeated="2"/>
          <table:table-cell office:value-type="float" office:value="91" calcext:value-type="float">
            <text:p>91</text:p>
          </table:table-cell>
          <table:table-cell table:formula="of:=[.C92]-[.B92]" office:value-type="float" office:value="-0.179000000000087" calcext:value-type="float">
            <text:p>-0.17900000000008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10.155" calcext:value-type="float">
            <text:p>1110.155</text:p>
          </table:table-cell>
          <table:table-cell office:value-type="float" office:value="1109.399" calcext:value-type="float">
            <text:p>1109.399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1"/>
          <table:table-cell table:number-columns-repeated="2"/>
          <table:table-cell office:value-type="float" office:value="92" calcext:value-type="float">
            <text:p>92</text:p>
          </table:table-cell>
          <table:table-cell table:formula="of:=[.C93]-[.B93]" office:value-type="float" office:value="-0.756000000000086" calcext:value-type="float">
            <text:p>-0.75600000000008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12.127" calcext:value-type="float">
            <text:p>1112.127</text:p>
          </table:table-cell>
          <table:table-cell office:value-type="float" office:value="1111.247" calcext:value-type="float">
            <text:p>1111.247</text:p>
          </table:table-cell>
          <table:table-cell table:style-name="ce1" office:value-type="float" office:value="98" calcext:value-type="float">
            <text:p>98</text:p>
          </table:table-cell>
          <table:table-cell table:style-name="ce1" table:number-columns-repeated="11"/>
          <table:table-cell table:number-columns-repeated="2"/>
          <table:table-cell office:value-type="float" office:value="93" calcext:value-type="float">
            <text:p>93</text:p>
          </table:table-cell>
          <table:table-cell table:formula="of:=[.C94]-[.B94]" office:value-type="float" office:value="-0.879999999999882" calcext:value-type="float">
            <text:p>-0.87999999999988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36.123" calcext:value-type="float">
            <text:p>1136.123</text:p>
          </table:table-cell>
          <table:table-cell office:value-type="float" office:value="1138.732" calcext:value-type="float">
            <text:p>1138.732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11"/>
          <table:table-cell table:number-columns-repeated="2"/>
          <table:table-cell office:value-type="float" office:value="94" calcext:value-type="float">
            <text:p>94</text:p>
          </table:table-cell>
          <table:table-cell table:formula="of:=[.C95]-[.B95]" office:value-type="float" office:value="2.60899999999992" calcext:value-type="float">
            <text:p>2.608999999999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6.463" calcext:value-type="float">
            <text:p>1136.463</text:p>
          </table:table-cell>
          <table:table-cell office:value-type="float" office:value="1139.355" calcext:value-type="float">
            <text:p>1139.35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1"/>
          <table:table-cell table:number-columns-repeated="2"/>
          <table:table-cell office:value-type="float" office:value="95" calcext:value-type="float">
            <text:p>95</text:p>
          </table:table-cell>
          <table:table-cell table:formula="of:=[.C96]-[.B96]" office:value-type="float" office:value="2.89200000000005" calcext:value-type="float">
            <text:p>2.8920000000000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48.816" calcext:value-type="float">
            <text:p>1148.816</text:p>
          </table:table-cell>
          <table:table-cell office:value-type="float" office:value="1149.94" calcext:value-type="float">
            <text:p>1149.94</text:p>
          </table:table-cell>
          <table:table-cell table:style-name="ce1" office:value-type="float" office:value="101" calcext:value-type="float">
            <text:p>101</text:p>
          </table:table-cell>
          <table:table-cell table:style-name="ce1" table:number-columns-repeated="11"/>
          <table:table-cell table:number-columns-repeated="2"/>
          <table:table-cell office:value-type="float" office:value="96" calcext:value-type="float">
            <text:p>96</text:p>
          </table:table-cell>
          <table:table-cell table:formula="of:=[.C97]-[.B97]" office:value-type="float" office:value="1.12400000000002" calcext:value-type="float">
            <text:p>1.124000000000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149.43</text:p>
          </table:table-cell>
          <table:table-cell office:value-type="float" office:value="1150.126" calcext:value-type="float">
            <text:p>1150.126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11"/>
          <table:table-cell table:number-columns-repeated="2"/>
          <table:table-cell office:value-type="float" office:value="97" calcext:value-type="float">
            <text:p>97</text:p>
          </table:table-cell>
          <table:table-cell table:formula="of:=[.C98]-[.B98]" office:value-type="float" office:value="0.695999999999913" calcext:value-type="float">
            <text:p>0.69599999999991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76.188" calcext:value-type="float">
            <text:p>1176.188</text:p>
          </table:table-cell>
          <table:table-cell office:value-type="float" office:value="1177.036" calcext:value-type="float">
            <text:p>1177.036</text:p>
          </table:table-cell>
          <table:table-cell table:style-name="ce1" office:value-type="float" office:value="103" calcext:value-type="float">
            <text:p>103</text:p>
          </table:table-cell>
          <table:table-cell table:style-name="ce1" table:number-columns-repeated="11"/>
          <table:table-cell table:number-columns-repeated="2"/>
          <table:table-cell office:value-type="float" office:value="98" calcext:value-type="float">
            <text:p>98</text:p>
          </table:table-cell>
          <table:table-cell table:formula="of:=[.C99]-[.B99]" office:value-type="float" office:value="0.847999999999956" calcext:value-type="float">
            <text:p>0.84799999999995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76.871" calcext:value-type="float">
            <text:p>1176.871</text:p>
          </table:table-cell>
          <table:table-cell office:value-type="float" office:value="1177.322" calcext:value-type="float">
            <text:p>1177.322</text:p>
          </table:table-cell>
          <table:table-cell table:style-name="ce1" office:value-type="float" office:value="104" calcext:value-type="float">
            <text:p>104</text:p>
          </table:table-cell>
          <table:table-cell table:style-name="ce1" table:number-columns-repeated="11"/>
          <table:table-cell table:number-columns-repeated="2"/>
          <table:table-cell office:value-type="float" office:value="99" calcext:value-type="float">
            <text:p>99</text:p>
          </table:table-cell>
          <table:table-cell table:formula="of:=[.C100]-[.B100]" office:value-type="float" office:value="0.450999999999794" calcext:value-type="float">
            <text:p>0.45099999999979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02.331" calcext:value-type="float">
            <text:p>1202.331</text:p>
          </table:table-cell>
          <table:table-cell office:value-type="float" office:value="1207.134" calcext:value-type="float">
            <text:p>1207.134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number-columns-repeated="11"/>
          <table:table-cell table:number-columns-repeated="2"/>
          <table:table-cell office:value-type="float" office:value="100" calcext:value-type="float">
            <text:p>100</text:p>
          </table:table-cell>
          <table:table-cell table:formula="of:=[.C101]-[.B101]" office:value-type="float" office:value="4.80300000000011" calcext:value-type="float">
            <text:p>4.8030000000001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05.347" calcext:value-type="float">
            <text:p>1205.347</text:p>
          </table:table-cell>
          <table:table-cell office:value-type="float" office:value="1208.667" calcext:value-type="float">
            <text:p>1208.667</text:p>
          </table:table-cell>
          <table:table-cell table:style-name="ce1" office:value-type="float" office:value="106" calcext:value-type="float">
            <text:p>106</text:p>
          </table:table-cell>
          <table:table-cell table:style-name="ce1" table:number-columns-repeated="11"/>
          <table:table-cell table:number-columns-repeated="2"/>
          <table:table-cell office:value-type="float" office:value="101" calcext:value-type="float">
            <text:p>101</text:p>
          </table:table-cell>
          <table:table-cell table:formula="of:=[.C102]-[.B102]" office:value-type="float" office:value="3.31999999999994" calcext:value-type="float">
            <text:p>3.319999999999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3.177" calcext:value-type="float">
            <text:p>1253.177</text:p>
          </table:table-cell>
          <table:table-cell office:value-type="float" office:value="1249.941" calcext:value-type="float">
            <text:p>1249.941</text:p>
          </table:table-cell>
          <table:table-cell table:style-name="ce1" office:value-type="float" office:value="107" calcext:value-type="float">
            <text:p>107</text:p>
          </table:table-cell>
          <table:table-cell table:style-name="ce1" table:number-columns-repeated="11"/>
          <table:table-cell table:number-columns-repeated="2"/>
          <table:table-cell office:value-type="float" office:value="102" calcext:value-type="float">
            <text:p>102</text:p>
          </table:table-cell>
          <table:table-cell table:formula="of:=[.C103]-[.B103]" office:value-type="float" office:value="-3.23599999999988" calcext:value-type="float">
            <text:p>-3.2359999999998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55.395" calcext:value-type="float">
            <text:p>1255.395</text:p>
          </table:table-cell>
          <table:table-cell office:value-type="float" office:value="1250.824" calcext:value-type="float">
            <text:p>1250.824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11"/>
          <table:table-cell table:number-columns-repeated="2"/>
          <table:table-cell office:value-type="float" office:value="103" calcext:value-type="float">
            <text:p>103</text:p>
          </table:table-cell>
          <table:table-cell table:formula="of:=[.C104]-[.B104]" office:value-type="float" office:value="-4.57099999999991" calcext:value-type="float">
            <text:p>-4.5709999999999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70.748" calcext:value-type="float">
            <text:p>1270.748</text:p>
          </table:table-cell>
          <table:table-cell office:value-type="float" office:value="1271.965" calcext:value-type="float">
            <text:p>1271.965</text:p>
          </table:table-cell>
          <table:table-cell table:style-name="ce1" office:value-type="float" office:value="109" calcext:value-type="float">
            <text:p>109</text:p>
          </table:table-cell>
          <table:table-cell table:style-name="ce1" table:number-columns-repeated="11"/>
          <table:table-cell table:number-columns-repeated="2"/>
          <table:table-cell office:value-type="float" office:value="104" calcext:value-type="float">
            <text:p>104</text:p>
          </table:table-cell>
          <table:table-cell table:formula="of:=[.C105]-[.B105]" office:value-type="float" office:value="1.21699999999987" calcext:value-type="float">
            <text:p>1.2169999999998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75.665" calcext:value-type="float">
            <text:p>1275.665</text:p>
          </table:table-cell>
          <table:table-cell office:value-type="float" office:value="1274.068" calcext:value-type="float">
            <text:p>1274.068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number-columns-repeated="11"/>
          <table:table-cell table:number-columns-repeated="2"/>
          <table:table-cell office:value-type="float" office:value="105" calcext:value-type="float">
            <text:p>105</text:p>
          </table:table-cell>
          <table:table-cell table:formula="of:=[.C106]-[.B106]" office:value-type="float" office:value="-1.59699999999998" calcext:value-type="float">
            <text:p>-1.5969999999999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31.192" calcext:value-type="float">
            <text:p>1331.192</text:p>
          </table:table-cell>
          <table:table-cell office:value-type="float" office:value="1332.782" calcext:value-type="float">
            <text:p>1332.78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1" calcext:value-type="float">
            <text:p>111</text:p>
          </table:table-cell>
          <table:table-cell table:style-name="ce1" table:number-columns-repeated="10"/>
          <table:table-cell table:number-columns-repeated="2"/>
          <table:table-cell office:value-type="float" office:value="106" calcext:value-type="float">
            <text:p>106</text:p>
          </table:table-cell>
          <table:table-cell table:formula="of:=[.C107]-[.B107]" office:value-type="float" office:value="1.58999999999992" calcext:value-type="float">
            <text:p>1.5899999999999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35.085" calcext:value-type="float">
            <text:p>1335.085</text:p>
          </table:table-cell>
          <table:table-cell office:value-type="float" office:value="1330.373" calcext:value-type="float">
            <text:p>1330.373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table:number-columns-repeated="10"/>
          <table:table-cell table:number-columns-repeated="2"/>
          <table:table-cell office:value-type="float" office:value="107" calcext:value-type="float">
            <text:p>107</text:p>
          </table:table-cell>
          <table:table-cell table:formula="of:=[.C108]-[.B108]" office:value-type="float" office:value="-4.71199999999999" calcext:value-type="float">
            <text:p>-4.7119999999999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38.125" calcext:value-type="float">
            <text:p>1338.125</text:p>
          </table:table-cell>
          <table:table-cell office:value-type="float" office:value="1328.97" calcext:value-type="float">
            <text:p>1328.97</text:p>
          </table:table-cell>
          <table:table-cell table:style-name="ce1" office:value-type="float" office:value="111" calcext:value-type="float">
            <text:p>111</text:p>
          </table:table-cell>
          <table:table-cell table:style-name="ce1" table:number-columns-repeated="11"/>
          <table:table-cell table:number-columns-repeated="2"/>
          <table:table-cell office:value-type="float" office:value="108" calcext:value-type="float">
            <text:p>108</text:p>
          </table:table-cell>
          <table:table-cell table:formula="of:=[.C109]-[.B109]" office:value-type="float" office:value="-9.15499999999997" calcext:value-type="float">
            <text:p>-9.1549999999999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38.288" calcext:value-type="float">
            <text:p>1338.288</text:p>
          </table:table-cell>
          <table:table-cell office:value-type="float" office:value="1340.838" calcext:value-type="float">
            <text:p>1340.838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24" calcext:value-type="float">
            <text:p>124</text:p>
          </table:table-cell>
          <table:table-cell table:style-name="ce1" table:number-columns-repeated="10"/>
          <table:table-cell table:number-columns-repeated="2"/>
          <table:table-cell office:value-type="float" office:value="109" calcext:value-type="float">
            <text:p>109</text:p>
          </table:table-cell>
          <table:table-cell table:formula="of:=[.C110]-[.B110]" office:value-type="float" office:value="2.54999999999995" calcext:value-type="float">
            <text:p>2.5499999999999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59.741" calcext:value-type="float">
            <text:p>1359.741</text:p>
          </table:table-cell>
          <table:table-cell office:value-type="float" office:value="1379.937" calcext:value-type="float">
            <text:p>1379.93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number-columns-repeated="9"/>
          <table:table-cell table:number-columns-repeated="2"/>
          <table:table-cell office:value-type="float" office:value="110" calcext:value-type="float">
            <text:p>110</text:p>
          </table:table-cell>
          <table:table-cell table:formula="of:=[.C111]-[.B111]" office:value-type="float" office:value="20.1959999999999" calcext:value-type="float">
            <text:p>20.195999999999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62.631" calcext:value-type="float">
            <text:p>1362.631</text:p>
          </table:table-cell>
          <table:table-cell office:value-type="float" office:value="1369.779" calcext:value-type="float">
            <text:p>1369.77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table:number-columns-repeated="10"/>
          <table:table-cell table:number-columns-repeated="2"/>
          <table:table-cell office:value-type="float" office:value="111" calcext:value-type="float">
            <text:p>111</text:p>
          </table:table-cell>
          <table:table-cell table:formula="of:=[.C112]-[.B112]" office:value-type="float" office:value="7.14799999999991" calcext:value-type="float">
            <text:p>7.1479999999999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96.028" calcext:value-type="float">
            <text:p>1396.028</text:p>
          </table:table-cell>
          <table:table-cell office:value-type="float" office:value="1401.349" calcext:value-type="float">
            <text:p>1401.34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number-columns-repeated="10"/>
          <table:table-cell table:number-columns-repeated="2"/>
          <table:table-cell office:value-type="float" office:value="112" calcext:value-type="float">
            <text:p>112</text:p>
          </table:table-cell>
          <table:table-cell table:formula="of:=[.C113]-[.B113]" office:value-type="float" office:value="5.32099999999991" calcext:value-type="float">
            <text:p>5.3209999999999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04.451" calcext:value-type="float">
            <text:p>1404.451</text:p>
          </table:table-cell>
          <table:table-cell office:value-type="float" office:value="1405.412" calcext:value-type="float">
            <text:p>1405.412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number-columns-repeated="11"/>
          <table:table-cell table:number-columns-repeated="2"/>
          <table:table-cell office:value-type="float" office:value="113" calcext:value-type="float">
            <text:p>113</text:p>
          </table:table-cell>
          <table:table-cell table:formula="of:=[.C114]-[.B114]" office:value-type="float" office:value="0.961000000000013" calcext:value-type="float">
            <text:p>0.96100000000001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04.619" calcext:value-type="float">
            <text:p>1404.619</text:p>
          </table:table-cell>
          <table:table-cell office:value-type="float" office:value="1401.026" calcext:value-type="float">
            <text:p>1401.026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number-columns-repeated="10"/>
          <table:table-cell table:number-columns-repeated="2"/>
          <table:table-cell office:value-type="float" office:value="114" calcext:value-type="float">
            <text:p>114</text:p>
          </table:table-cell>
          <table:table-cell table:formula="of:=[.C115]-[.B115]" office:value-type="float" office:value="-3.59299999999985" calcext:value-type="float">
            <text:p>-3.5929999999998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07.611" calcext:value-type="float">
            <text:p>1407.611</text:p>
          </table:table-cell>
          <table:table-cell office:value-type="float" office:value="1409.65" calcext:value-type="float">
            <text:p>1409.65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number-columns-repeated="9"/>
          <table:table-cell table:number-columns-repeated="2"/>
          <table:table-cell office:value-type="float" office:value="115" calcext:value-type="float">
            <text:p>115</text:p>
          </table:table-cell>
          <table:table-cell table:formula="of:=[.C116]-[.B116]" office:value-type="float" office:value="2.03899999999999" calcext:value-type="float">
            <text:p>2.0389999999999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16.513" calcext:value-type="float">
            <text:p>1416.513</text:p>
          </table:table-cell>
          <table:table-cell office:value-type="float" office:value="1419.563" calcext:value-type="float">
            <text:p>1419.563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number-columns-repeated="11"/>
          <table:table-cell table:number-columns-repeated="2"/>
          <table:table-cell office:value-type="float" office:value="116" calcext:value-type="float">
            <text:p>116</text:p>
          </table:table-cell>
          <table:table-cell table:formula="of:=[.C117]-[.B117]" office:value-type="float" office:value="3.05000000000018" calcext:value-type="float">
            <text:p>3.0500000000001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17.04" calcext:value-type="float">
            <text:p>1417.04</text:p>
          </table:table-cell>
          <table:table-cell office:value-type="float" office:value="1419.589" calcext:value-type="float">
            <text:p>1419.589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number-columns-repeated="11"/>
          <table:table-cell table:number-columns-repeated="2"/>
          <table:table-cell office:value-type="float" office:value="117" calcext:value-type="float">
            <text:p>117</text:p>
          </table:table-cell>
          <table:table-cell table:formula="of:=[.C118]-[.B118]" office:value-type="float" office:value="2.54899999999998" calcext:value-type="float">
            <text:p>2.5489999999999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81.21" calcext:value-type="float">
            <text:p>1481.21</text:p>
          </table:table-cell>
          <table:table-cell office:value-type="float" office:value="1484.699" calcext:value-type="float">
            <text:p>1484.699</text:p>
          </table:table-cell>
          <table:table-cell table:style-name="ce1" office:value-type="float" office:value="123" calcext:value-type="float">
            <text:p>123</text:p>
          </table:table-cell>
          <table:table-cell table:style-name="ce1" table:number-columns-repeated="11"/>
          <table:table-cell table:number-columns-repeated="2"/>
          <table:table-cell office:value-type="float" office:value="118" calcext:value-type="float">
            <text:p>118</text:p>
          </table:table-cell>
          <table:table-cell table:formula="of:=[.C119]-[.B119]" office:value-type="float" office:value="3.48900000000003" calcext:value-type="float">
            <text:p>3.4890000000000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81.696" calcext:value-type="float">
            <text:p>1481.696</text:p>
          </table:table-cell>
          <table:table-cell office:value-type="float" office:value="1487.177" calcext:value-type="float">
            <text:p>1487.17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number-columns-repeated="10"/>
          <table:table-cell table:number-columns-repeated="2"/>
          <table:table-cell office:value-type="float" office:value="119" calcext:value-type="float">
            <text:p>119</text:p>
          </table:table-cell>
          <table:table-cell table:formula="of:=[.C120]-[.B120]" office:value-type="float" office:value="5.48099999999999" calcext:value-type="float">
            <text:p>5.4809999999999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93.271" calcext:value-type="float">
            <text:p>1493.271</text:p>
          </table:table-cell>
          <table:table-cell office:value-type="float" office:value="1494.429" calcext:value-type="float">
            <text:p>1494.429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number-columns-repeated="11"/>
          <table:table-cell table:number-columns-repeated="2"/>
          <table:table-cell office:value-type="float" office:value="120" calcext:value-type="float">
            <text:p>120</text:p>
          </table:table-cell>
          <table:table-cell table:formula="of:=[.C121]-[.B121]" office:value-type="float" office:value="1.15800000000013" calcext:value-type="float">
            <text:p>1.1580000000001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93.337" calcext:value-type="float">
            <text:p>1493.337</text:p>
          </table:table-cell>
          <table:table-cell office:value-type="float" office:value="1493.685" calcext:value-type="float">
            <text:p>1493.685</text:p>
          </table:table-cell>
          <table:table-cell table:style-name="ce1" office:value-type="float" office:value="125" calcext:value-type="float">
            <text:p>125</text:p>
          </table:table-cell>
          <table:table-cell table:style-name="ce1" table:number-columns-repeated="11"/>
          <table:table-cell table:number-columns-repeated="2"/>
          <table:table-cell office:value-type="float" office:value="121" calcext:value-type="float">
            <text:p>121</text:p>
          </table:table-cell>
          <table:table-cell table:formula="of:=[.C122]-[.B122]" office:value-type="float" office:value="0.347999999999956" calcext:value-type="float">
            <text:p>0.34799999999995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11.46" calcext:value-type="float">
            <text:p>1511.46</text:p>
          </table:table-cell>
          <table:table-cell office:value-type="float" office:value="1513.175" calcext:value-type="float">
            <text:p>1513.175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number-columns-repeated="11"/>
          <table:table-cell table:number-columns-repeated="2"/>
          <table:table-cell office:value-type="float" office:value="122" calcext:value-type="float">
            <text:p>122</text:p>
          </table:table-cell>
          <table:table-cell table:formula="of:=[.C123]-[.B123]" office:value-type="float" office:value="1.71499999999992" calcext:value-type="float">
            <text:p>1.7149999999999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14.945" calcext:value-type="float">
            <text:p>1514.945</text:p>
          </table:table-cell>
          <table:table-cell office:value-type="float" office:value="1516.373" calcext:value-type="float">
            <text:p>1516.373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number-columns-repeated="11"/>
          <table:table-cell table:number-columns-repeated="2"/>
          <table:table-cell office:value-type="float" office:value="123" calcext:value-type="float">
            <text:p>123</text:p>
          </table:table-cell>
          <table:table-cell table:formula="of:=[.C124]-[.B124]" office:value-type="float" office:value="1.42800000000011" calcext:value-type="float">
            <text:p>1.4280000000001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38.086" calcext:value-type="float">
            <text:p>1538.086</text:p>
          </table:table-cell>
          <table:table-cell office:value-type="float" office:value="1539.88" calcext:value-type="float">
            <text:p>1539.88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1" calcext:value-type="float">
            <text:p>131</text:p>
          </table:table-cell>
          <table:table-cell table:style-name="ce1" table:number-columns-repeated="9"/>
          <table:table-cell table:number-columns-repeated="2"/>
          <table:table-cell office:value-type="float" office:value="124" calcext:value-type="float">
            <text:p>124</text:p>
          </table:table-cell>
          <table:table-cell table:formula="of:=[.C125]-[.B125]" office:value-type="float" office:value="1.7940000000001" calcext:value-type="float">
            <text:p>1.794000000000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50.293" calcext:value-type="float">
            <text:p>1550.293</text:p>
          </table:table-cell>
          <table:table-cell office:value-type="float" office:value="1555.445" calcext:value-type="float">
            <text:p>1555.445</text:p>
          </table:table-cell>
          <table:table-cell table:style-name="ce1" office:value-type="float" office:value="130" calcext:value-type="float">
            <text:p>130</text:p>
          </table:table-cell>
          <table:table-cell table:style-name="ce1" table:number-columns-repeated="11"/>
          <table:table-cell table:number-columns-repeated="2"/>
          <table:table-cell office:value-type="float" office:value="125" calcext:value-type="float">
            <text:p>125</text:p>
          </table:table-cell>
          <table:table-cell table:formula="of:=[.C126]-[.B126]" office:value-type="float" office:value="5.15200000000004" calcext:value-type="float">
            <text:p>5.1520000000000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84.587" calcext:value-type="float">
            <text:p>1584.587</text:p>
          </table:table-cell>
          <table:table-cell office:value-type="float" office:value="1579.72" calcext:value-type="float">
            <text:p>1579.7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31" calcext:value-type="float">
            <text:p>131</text:p>
          </table:table-cell>
          <table:table-cell table:style-name="ce1" table:number-columns-repeated="10"/>
          <table:table-cell table:number-columns-repeated="2"/>
          <table:table-cell office:value-type="float" office:value="126" calcext:value-type="float">
            <text:p>126</text:p>
          </table:table-cell>
          <table:table-cell table:formula="of:=[.C127]-[.B127]" office:value-type="float" office:value="-4.86699999999996" calcext:value-type="float">
            <text:p>-4.8669999999999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85.574" calcext:value-type="float">
            <text:p>1585.574</text:p>
          </table:table-cell>
          <table:table-cell office:value-type="float" office:value="1580.843" calcext:value-type="float">
            <text:p>1580.84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10"/>
          <table:table-cell table:number-columns-repeated="2"/>
          <table:table-cell office:value-type="float" office:value="127" calcext:value-type="float">
            <text:p>127</text:p>
          </table:table-cell>
          <table:table-cell table:formula="of:=[.C128]-[.B128]" office:value-type="float" office:value="-4.73099999999999" calcext:value-type="float">
            <text:p>-4.7309999999999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19.528" calcext:value-type="float">
            <text:p>1619.528</text:p>
          </table:table-cell>
          <table:table-cell office:value-type="float" office:value="1614.515" calcext:value-type="float">
            <text:p>1614.51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6" calcext:value-type="float">
            <text:p>136</text:p>
          </table:table-cell>
          <table:table-cell table:style-name="ce1" table:number-columns-repeated="10"/>
          <table:table-cell table:number-columns-repeated="2"/>
          <table:table-cell office:value-type="float" office:value="128" calcext:value-type="float">
            <text:p>128</text:p>
          </table:table-cell>
          <table:table-cell table:formula="of:=[.C129]-[.B129]" office:value-type="float" office:value="-5.01299999999992" calcext:value-type="float">
            <text:p>-5.0129999999999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21.108" calcext:value-type="float">
            <text:p>1621.108</text:p>
          </table:table-cell>
          <table:table-cell office:value-type="float" office:value="1617.912" calcext:value-type="float">
            <text:p>1617.91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table:number-columns-repeated="10"/>
          <table:table-cell table:number-columns-repeated="2"/>
          <table:table-cell office:value-type="float" office:value="129" calcext:value-type="float">
            <text:p>129</text:p>
          </table:table-cell>
          <table:table-cell table:formula="of:=[.C130]-[.B130]" office:value-type="float" office:value="-3.19599999999991" calcext:value-type="float">
            <text:p>-3.1959999999999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46.403" calcext:value-type="float">
            <text:p>1646.403</text:p>
          </table:table-cell>
          <table:table-cell office:value-type="float" office:value="1651.613" calcext:value-type="float">
            <text:p>1651.61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1" calcext:value-type="float">
            <text:p>141</text:p>
          </table:table-cell>
          <table:table-cell table:style-name="ce1" table:number-columns-repeated="7"/>
          <table:table-cell table:number-columns-repeated="2"/>
          <table:table-cell office:value-type="float" office:value="130" calcext:value-type="float">
            <text:p>130</text:p>
          </table:table-cell>
          <table:table-cell table:formula="of:=[.C131]-[.B131]" office:value-type="float" office:value="5.21000000000004" calcext:value-type="float">
            <text:p>5.2100000000000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48.013" calcext:value-type="float">
            <text:p>1648.013</text:p>
          </table:table-cell>
          <table:table-cell office:value-type="float" office:value="1651.883" calcext:value-type="float">
            <text:p>1651.88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2" calcext:value-type="float">
            <text:p>142</text:p>
          </table:table-cell>
          <table:table-cell table:style-name="ce1" table:number-columns-repeated="7"/>
          <table:table-cell table:number-columns-repeated="2"/>
          <table:table-cell office:value-type="float" office:value="131" calcext:value-type="float">
            <text:p>131</text:p>
          </table:table-cell>
          <table:table-cell table:formula="of:=[.C132]-[.B132]" office:value-type="float" office:value="3.87000000000012" calcext:value-type="float">
            <text:p>3.8700000000001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60.354" calcext:value-type="float">
            <text:p>1660.354</text:p>
          </table:table-cell>
          <table:table-cell office:value-type="float" office:value="1661.637" calcext:value-type="float">
            <text:p>1661.63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1" calcext:value-type="float">
            <text:p>141</text:p>
          </table:table-cell>
          <table:table-cell table:style-name="ce1" table:number-columns-repeated="8"/>
          <table:table-cell table:number-columns-repeated="2"/>
          <table:table-cell office:value-type="float" office:value="132" calcext:value-type="float">
            <text:p>132</text:p>
          </table:table-cell>
          <table:table-cell table:formula="of:=[.C133]-[.B133]" office:value-type="float" office:value="1.2829999999999" calcext:value-type="float">
            <text:p>1.282999999999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61.534" calcext:value-type="float">
            <text:p>1661.534</text:p>
          </table:table-cell>
          <table:table-cell office:value-type="float" office:value="1662.351" calcext:value-type="float">
            <text:p>1662.351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number-columns-repeated="9"/>
          <table:table-cell table:number-columns-repeated="2"/>
          <table:table-cell office:value-type="float" office:value="133" calcext:value-type="float">
            <text:p>133</text:p>
          </table:table-cell>
          <table:table-cell table:formula="of:=[.C134]-[.B134]" office:value-type="float" office:value="0.817000000000007" calcext:value-type="float">
            <text:p>0.81700000000000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66.801" calcext:value-type="float">
            <text:p>1666.801</text:p>
          </table:table-cell>
          <table:table-cell office:value-type="float" office:value="1675.77" calcext:value-type="float">
            <text:p>1675.7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table:number-columns-repeated="5"/>
          <table:table-cell table:number-columns-repeated="2"/>
          <table:table-cell office:value-type="float" office:value="134" calcext:value-type="float">
            <text:p>134</text:p>
          </table:table-cell>
          <table:table-cell table:formula="of:=[.C135]-[.B135]" office:value-type="float" office:value="8.96900000000005" calcext:value-type="float">
            <text:p>8.9690000000000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68.211" calcext:value-type="float">
            <text:p>1668.211</text:p>
          </table:table-cell>
          <table:table-cell office:value-type="float" office:value="1679.874" calcext:value-type="float">
            <text:p>1679.87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table:number-columns-repeated="6"/>
          <table:table-cell table:number-columns-repeated="2"/>
          <table:table-cell office:value-type="float" office:value="135" calcext:value-type="float">
            <text:p>135</text:p>
          </table:table-cell>
          <table:table-cell table:formula="of:=[.C136]-[.B136]" office:value-type="float" office:value="11.663" calcext:value-type="float">
            <text:p>11.66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82.031" calcext:value-type="float">
            <text:p>1682.031</text:p>
          </table:table-cell>
          <table:table-cell office:value-type="float" office:value="1713.112" calcext:value-type="float">
            <text:p>1713.11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table:number-columns-repeated="5"/>
          <table:table-cell table:number-columns-repeated="2"/>
          <table:table-cell office:value-type="float" office:value="136" calcext:value-type="float">
            <text:p>136</text:p>
          </table:table-cell>
          <table:table-cell table:formula="of:=[.C137]-[.B137]" office:value-type="float" office:value="31.0810000000001" calcext:value-type="float">
            <text:p>31.081000000000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82.522" calcext:value-type="float">
            <text:p>1682.522</text:p>
          </table:table-cell>
          <table:table-cell office:value-type="float" office:value="1715.655" calcext:value-type="float">
            <text:p>1715.65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4" calcext:value-type="float">
            <text:p>144</text:p>
          </table:table-cell>
          <table:table-cell table:style-name="ce1" table:number-columns-repeated="7"/>
          <table:table-cell table:number-columns-repeated="2"/>
          <table:table-cell office:value-type="float" office:value="137" calcext:value-type="float">
            <text:p>137</text:p>
          </table:table-cell>
          <table:table-cell table:formula="of:=[.C138]-[.B138]" office:value-type="float" office:value="33.133" calcext:value-type="float">
            <text:p>33.13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30.072" calcext:value-type="float">
            <text:p>3130.072</text:p>
          </table:table-cell>
          <table:table-cell office:value-type="float" office:value="3180.515" calcext:value-type="float">
            <text:p>3180.51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table:number-columns-repeated="10"/>
          <table:table-cell table:number-columns-repeated="2"/>
          <table:table-cell office:value-type="float" office:value="138" calcext:value-type="float">
            <text:p>138</text:p>
          </table:table-cell>
          <table:table-cell table:formula="of:=[.C139]-[.B139]" office:value-type="float" office:value="50.4429999999998" calcext:value-type="float">
            <text:p>50.442999999999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130.112" calcext:value-type="float">
            <text:p>3130.112</text:p>
          </table:table-cell>
          <table:table-cell office:value-type="float" office:value="3180.517" calcext:value-type="float">
            <text:p>3180.517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table:number-columns-repeated="10"/>
          <table:table-cell table:number-columns-repeated="2"/>
          <table:table-cell office:value-type="float" office:value="139" calcext:value-type="float">
            <text:p>139</text:p>
          </table:table-cell>
          <table:table-cell table:formula="of:=[.C140]-[.B140]" office:value-type="float" office:value="50.4049999999997" calcext:value-type="float">
            <text:p>50.404999999999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197.56" calcext:value-type="float">
            <text:p>3197.56</text:p>
          </table:table-cell>
          <table:table-cell office:value-type="float" office:value="3208.911" calcext:value-type="float">
            <text:p>3208.911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table:number-columns-repeated="8"/>
          <table:table-cell table:number-columns-repeated="2"/>
          <table:table-cell office:value-type="float" office:value="140" calcext:value-type="float">
            <text:p>140</text:p>
          </table:table-cell>
          <table:table-cell table:formula="of:=[.C141]-[.B141]" office:value-type="float" office:value="11.3510000000001" calcext:value-type="float">
            <text:p>11.351000000000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197.64" calcext:value-type="float">
            <text:p>3197.64</text:p>
          </table:table-cell>
          <table:table-cell office:value-type="float" office:value="3208.843" calcext:value-type="float">
            <text:p>3208.843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table:number-columns-repeated="8"/>
          <table:table-cell table:number-columns-repeated="2"/>
          <table:table-cell office:value-type="float" office:value="141" calcext:value-type="float">
            <text:p>141</text:p>
          </table:table-cell>
          <table:table-cell table:formula="of:=[.C142]-[.B142]" office:value-type="float" office:value="11.203" calcext:value-type="float">
            <text:p>11.20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204.329" calcext:value-type="float">
            <text:p>3204.329</text:p>
          </table:table-cell>
          <table:table-cell office:value-type="float" office:value="3208.841" calcext:value-type="float">
            <text:p>3208.841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table:number-columns-repeated="8"/>
          <table:table-cell table:number-columns-repeated="2"/>
          <table:table-cell office:value-type="float" office:value="142" calcext:value-type="float">
            <text:p>142</text:p>
          </table:table-cell>
          <table:table-cell table:formula="of:=[.C143]-[.B143]" office:value-type="float" office:value="4.51199999999972" calcext:value-type="float">
            <text:p>4.5119999999997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204.373" calcext:value-type="float">
            <text:p>3204.373</text:p>
          </table:table-cell>
          <table:table-cell office:value-type="float" office:value="3208.839" calcext:value-type="float">
            <text:p>3208.83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table:number-columns-repeated="8"/>
          <table:table-cell table:number-columns-repeated="2"/>
          <table:table-cell office:value-type="float" office:value="143" calcext:value-type="float">
            <text:p>143</text:p>
          </table:table-cell>
          <table:table-cell table:formula="of:=[.C144]-[.B144]" office:value-type="float" office:value="4.46599999999989" calcext:value-type="float">
            <text:p>4.4659999999998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217.191" calcext:value-type="float">
            <text:p>3217.191</text:p>
          </table:table-cell>
          <table:table-cell office:value-type="float" office:value="3221.756" calcext:value-type="float">
            <text:p>3221.756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table:number-columns-repeated="10"/>
          <table:table-cell table:number-columns-repeated="2"/>
          <table:table-cell office:value-type="float" office:value="144" calcext:value-type="float">
            <text:p>144</text:p>
          </table:table-cell>
          <table:table-cell table:formula="of:=[.C145]-[.B145]" office:value-type="float" office:value="4.56500000000006" calcext:value-type="float">
            <text:p>4.5650000000000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17.208" calcext:value-type="float">
            <text:p>3217.208</text:p>
          </table:table-cell>
          <table:table-cell office:value-type="float" office:value="3221.709" calcext:value-type="float">
            <text:p>3221.709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table:number-columns-repeated="10"/>
          <table:table-cell table:number-columns-repeated="2"/>
          <table:table-cell office:value-type="float" office:value="145" calcext:value-type="float">
            <text:p>145</text:p>
          </table:table-cell>
          <table:table-cell table:formula="of:=[.C146]-[.B146]" office:value-type="float" office:value="4.50099999999975" calcext:value-type="float">
            <text:p>4.5009999999997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217.46" calcext:value-type="float">
            <text:p>3217.46</text:p>
          </table:table-cell>
          <table:table-cell office:value-type="float" office:value="3218.215" calcext:value-type="float">
            <text:p>3218.215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10"/>
          <table:table-cell table:number-columns-repeated="2"/>
          <table:table-cell office:value-type="float" office:value="146" calcext:value-type="float">
            <text:p>146</text:p>
          </table:table-cell>
          <table:table-cell table:formula="of:=[.C147]-[.B147]" office:value-type="float" office:value="0.755000000000109" calcext:value-type="float">
            <text:p>0.75500000000010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217.474" calcext:value-type="float">
            <text:p>3217.474</text:p>
          </table:table-cell>
          <table:table-cell office:value-type="float" office:value="3218.249" calcext:value-type="float">
            <text:p>3218.249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10"/>
          <table:table-cell table:number-columns-repeated="2"/>
          <table:table-cell office:value-type="float" office:value="147" calcext:value-type="float">
            <text:p>147</text:p>
          </table:table-cell>
          <table:table-cell table:formula="of:=[.C148]-[.B148]" office:value-type="float" office:value="0.774999999999636" calcext:value-type="float">
            <text:p>0.77499999999963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226.078" calcext:value-type="float">
            <text:p>3226.078</text:p>
          </table:table-cell>
          <table:table-cell office:value-type="float" office:value="3229.939" calcext:value-type="float">
            <text:p>3229.939</text:p>
          </table:table-cell>
          <table:table-cell table:style-name="ce1" office:value-type="float" office:value="154" calcext:value-type="float">
            <text:p>154</text:p>
          </table:table-cell>
          <table:table-cell table:style-name="ce1" table:number-columns-repeated="11"/>
          <table:table-cell table:number-columns-repeated="2"/>
          <table:table-cell office:value-type="float" office:value="148" calcext:value-type="float">
            <text:p>148</text:p>
          </table:table-cell>
          <table:table-cell table:formula="of:=[.C149]-[.B149]" office:value-type="float" office:value="3.86099999999988" calcext:value-type="float">
            <text:p>3.8609999999998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226.105" calcext:value-type="float">
            <text:p>3226.105</text:p>
          </table:table-cell>
          <table:table-cell office:value-type="float" office:value="3229.792" calcext:value-type="float">
            <text:p>3229.792</text:p>
          </table:table-cell>
          <table:table-cell table:style-name="ce1" office:value-type="float" office:value="153" calcext:value-type="float">
            <text:p>153</text:p>
          </table:table-cell>
          <table:table-cell table:style-name="ce1" table:number-columns-repeated="11"/>
          <table:table-cell table:number-columns-repeated="2"/>
          <table:table-cell office:value-type="float" office:value="149" calcext:value-type="float">
            <text:p>149</text:p>
          </table:table-cell>
          <table:table-cell table:formula="of:=[.C150]-[.B150]" office:value-type="float" office:value="3.6869999999999" calcext:value-type="float">
            <text:p>3.686999999999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231.031" calcext:value-type="float">
            <text:p>3231.031</text:p>
          </table:table-cell>
          <table:table-cell office:value-type="float" office:value="3233.982" calcext:value-type="float">
            <text:p>3233.98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table:number-columns-repeated="10"/>
          <table:table-cell table:number-columns-repeated="2"/>
          <table:table-cell office:value-type="float" office:value="150" calcext:value-type="float">
            <text:p>150</text:p>
          </table:table-cell>
          <table:table-cell table:formula="of:=[.C151]-[.B151]" office:value-type="float" office:value="2.95100000000002" calcext:value-type="float">
            <text:p>2.9510000000000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231.075" calcext:value-type="float">
            <text:p>3231.075</text:p>
          </table:table-cell>
          <table:table-cell office:value-type="float" office:value="3234.188" calcext:value-type="float">
            <text:p>3234.188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table:number-columns-repeated="10"/>
          <table:table-cell table:number-columns-repeated="2"/>
          <table:table-cell office:value-type="float" office:value="151" calcext:value-type="float">
            <text:p>151</text:p>
          </table:table-cell>
          <table:table-cell table:formula="of:=[.C152]-[.B152]" office:value-type="float" office:value="3.11300000000028" calcext:value-type="float">
            <text:p>3.1130000000002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36.905" calcext:value-type="float">
            <text:p>3236.905</text:p>
          </table:table-cell>
          <table:table-cell office:value-type="float" office:value="3238.249" calcext:value-type="float">
            <text:p>3238.249</text:p>
          </table:table-cell>
          <table:table-cell table:style-name="ce1" office:value-type="float" office:value="157" calcext:value-type="float">
            <text:p>157</text:p>
          </table:table-cell>
          <table:table-cell table:style-name="ce1" table:number-columns-repeated="11"/>
          <table:table-cell table:number-columns-repeated="2"/>
          <table:table-cell office:value-type="float" office:value="152" calcext:value-type="float">
            <text:p>152</text:p>
          </table:table-cell>
          <table:table-cell table:formula="of:=[.C153]-[.B153]" office:value-type="float" office:value="1.3439999999996" calcext:value-type="float">
            <text:p>1.34399999999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236.932" calcext:value-type="float">
            <text:p>3236.932</text:p>
          </table:table-cell>
          <table:table-cell office:value-type="float" office:value="3238.269" calcext:value-type="float">
            <text:p>3238.269</text:p>
          </table:table-cell>
          <table:table-cell table:style-name="ce1" office:value-type="float" office:value="158" calcext:value-type="float">
            <text:p>158</text:p>
          </table:table-cell>
          <table:table-cell table:style-name="ce1" table:number-columns-repeated="11"/>
          <table:table-cell table:number-columns-repeated="2"/>
          <table:table-cell office:value-type="float" office:value="153" calcext:value-type="float">
            <text:p>153</text:p>
          </table:table-cell>
          <table:table-cell table:formula="of:=[.C154]-[.B154]" office:value-type="float" office:value="1.33699999999999" calcext:value-type="float">
            <text:p>1.33699999999999</text:p>
          </table:table-cell>
          <table:table-cell/>
        </table:table-row>
        <table:table-row table:style-name="ro1" table:number-rows-repeated="104842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12:49:18.403606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20:00:46.631981100</meta:creation-date>
    <dc:date>2026-06-11T14:29:42.448189300</dc:date>
    <meta:editing-duration>P1DT22H46M2S</meta:editing-duration>
    <meta:editing-cycles>16</meta:editing-cycles>
    <meta:generator>LibreOffice/26.2.0.3$Windows_X86_64 LibreOffice_project/620$Build-3</meta:generator>
    <meta:document-statistic meta:table-count="2" meta:cell-count="187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8.994cm" xlink:href=".." xlink:type="simple" chart:class="chart:scatter" chart:style-name="ch1">
        <chart:legend chart:legend-position="end" svg:x="14.689cm" svg:y="4.195cm" style:legend-expansion="high" chart:style-name="ch2"/>
        <chart:plot-area chart:style-name="ch3" svg:x="0.319cm" svg:y="0.179cm" svg:width="14.051cm" svg:height="8.636cm">
          <chart:coordinate-region svg:x="1.29cm" svg:y="0.381cm" svg:width="12.778cm" svg:height="8.2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tch_Eff.S2:Match_Eff.S154" chart:label-cell-address="Match_Eff.S1:Match_Eff.S1" chart:class="chart:scatter">
            <chart:domain table:cell-range-address="Match_Eff.R2:Match_Eff.R154"/>
            <chart:data-point chart:repeated="1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Diff</text:p>
                <draw:g>
                  <svg:desc>Match_Eff.S1:Match_Eff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tch_Eff.R2:Match_Eff.R154</svg:desc>
                </draw:g>
              </table:table-cell>
              <table:table-cell office:value-type="float" office:value="3.627">
                <text:p>3.627</text:p>
                <draw:g>
                  <svg:desc>Match_Eff.S2:Match_Eff.S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793">
                <text:p>14.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.471">
                <text:p>13.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928">
                <text:p>13.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508">
                <text:p>10.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9800000000001">
                <text:p>5.598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873">
                <text:p>9.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83">
                <text:p>2.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261">
                <text:p>3.2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759">
                <text:p>7.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.225">
                <text:p>27.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.481">
                <text:p>40.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3.385">
                <text:p>83.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3.338">
                <text:p>63.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559">
                <text:p>12.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8.814">
                <text:p>88.8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8.478">
                <text:p>48.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7.398">
                <text:p>47.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4.652">
                <text:p>64.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4.566">
                <text:p>64.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9.441">
                <text:p>39.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1.786">
                <text:p>41.7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.411">
                <text:p>22.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.953">
                <text:p>29.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6.163">
                <text:p>36.1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6.891">
                <text:p>26.8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0.713">
                <text:p>40.7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.353">
                <text:p>32.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.027">
                <text:p>29.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9.159">
                <text:p>29.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7.407">
                <text:p>17.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3.109">
                <text:p>23.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14499999999998">
                <text:p>9.14499999999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4.66899999999998">
                <text:p>-4.66899999999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03700000000003">
                <text:p>2.03700000000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642">
                <text:p>2.6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12.368">
                <text:p>-12.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.556">
                <text:p>25.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93899999999997">
                <text:p>8.93899999999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55100000000005">
                <text:p>8.55100000000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.698">
                <text:p>11.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6.682">
                <text:p>86.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71.165">
                <text:p>171.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87.393">
                <text:p>187.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77.12">
                <text:p>177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42.963">
                <text:p>242.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33.222">
                <text:p>233.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3.472">
                <text:p>23.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60.924">
                <text:p>160.9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.30999999999995">
                <text:p>6.30999999999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024">
                <text:p>7.0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.015">
                <text:p>11.0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31500000000005">
                <text:p>3.31500000000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339000000000056">
                <text:p>-0.339000000000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27800000000002">
                <text:p>1.278000000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87300000000005">
                <text:p>2.8730000000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03099999999995">
                <text:p>3.03099999999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89599999999996">
                <text:p>4.895999999999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7.41399999999999">
                <text:p>-7.4139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9.351">
                <text:p>-9.3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608000000000061">
                <text:p>-0.6080000000000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25000000000023">
                <text:p>0.7250000000000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97000000000003">
                <text:p>8.97000000000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71500000000003">
                <text:p>8.71500000000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944999999999936">
                <text:p>0.9449999999999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388999999999896">
                <text:p>0.388999999999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6.33199999999999">
                <text:p>-6.3319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5.97000000000003">
                <text:p>-5.970000000000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11.058">
                <text:p>-11.0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12.244">
                <text:p>-12.2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74699999999996">
                <text:p>1.74699999999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992999999999938">
                <text:p>0.9929999999999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307999999999993">
                <text:p>-0.307999999999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355000000000018">
                <text:p>-0.3550000000000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46.141">
                <text:p>-46.1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43.845">
                <text:p>-43.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33100000000002">
                <text:p>4.331000000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.02299999999991">
                <text:p>4.02299999999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8.86900000000003">
                <text:p>-8.869000000000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8.72500000000002">
                <text:p>-8.7250000000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2.68299999999999">
                <text:p>-2.68299999999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2.70100000000002">
                <text:p>-2.701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9.09100000000001">
                <text:p>-9.091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9.13800000000003">
                <text:p>-9.138000000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.7239999999999">
                <text:p>14.723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.9080000000001">
                <text:p>14.908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0.688999999999851">
                <text:p>-0.6889999999998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0.179000000000087">
                <text:p>-0.1790000000000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0.756000000000086">
                <text:p>-0.7560000000000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0.879999999999882">
                <text:p>-0.8799999999998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60899999999992">
                <text:p>2.608999999999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89200000000005">
                <text:p>2.89200000000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12400000000002">
                <text:p>1.1240000000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95999999999913">
                <text:p>0.6959999999999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847999999999956">
                <text:p>0.8479999999999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50999999999794">
                <text:p>0.4509999999997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.80300000000011">
                <text:p>4.803000000000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.31999999999994">
                <text:p>3.31999999999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3.23599999999988">
                <text:p>-3.235999999999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4.57099999999991">
                <text:p>-4.57099999999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21699999999987">
                <text:p>1.216999999999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1.59699999999998">
                <text:p>-1.596999999999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58999999999992">
                <text:p>1.589999999999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4.71199999999999">
                <text:p>-4.71199999999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9.15499999999997">
                <text:p>-9.154999999999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.54999999999995">
                <text:p>2.549999999999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0.1959999999999">
                <text:p>20.19599999999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14799999999991">
                <text:p>7.14799999999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32099999999991">
                <text:p>5.320999999999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961000000000013">
                <text:p>0.9610000000000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3.59299999999985">
                <text:p>-3.592999999999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.03899999999999">
                <text:p>2.03899999999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.05000000000018">
                <text:p>3.050000000000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.54899999999998">
                <text:p>2.54899999999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.48900000000003">
                <text:p>3.48900000000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48099999999999">
                <text:p>5.4809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15800000000013">
                <text:p>1.158000000000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347999999999956">
                <text:p>0.347999999999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71499999999992">
                <text:p>1.714999999999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2800000000011">
                <text:p>1.428000000000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7940000000001">
                <text:p>1.794000000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.15200000000004">
                <text:p>5.152000000000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4.86699999999996">
                <text:p>-4.866999999999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4.73099999999999">
                <text:p>-4.730999999999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5.01299999999992">
                <text:p>-5.012999999999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3.19599999999991">
                <text:p>-3.19599999999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21000000000004">
                <text:p>5.210000000000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.87000000000012">
                <text:p>3.870000000000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2829999999999">
                <text:p>1.28299999999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817000000000007">
                <text:p>0.817000000000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96900000000005">
                <text:p>8.96900000000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.663">
                <text:p>11.6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1.0810000000001">
                <text:p>31.081000000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3.133">
                <text:p>33.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0.4429999999998">
                <text:p>50.4429999999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0.4049999999997">
                <text:p>50.40499999999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.3510000000001">
                <text:p>11.3510000000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.203">
                <text:p>11.2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.51199999999972">
                <text:p>4.511999999999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.46599999999989">
                <text:p>4.465999999999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.56500000000006">
                <text:p>4.565000000000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.50099999999975">
                <text:p>4.500999999999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755000000000109">
                <text:p>0.7550000000001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774999999999636">
                <text:p>0.774999999999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.86099999999988">
                <text:p>3.860999999999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.6869999999999">
                <text:p>3.6869999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95100000000002">
                <text:p>2.951000000000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.11300000000028">
                <text:p>3.113000000000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3439999999996">
                <text:p>1.34399999999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33699999999999">
                <text:p>1.336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